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142.41pt"/>
    </style:style>
    <style:style style:name="co7" style:family="table-column">
      <style:table-column-properties fo:break-before="auto" style:column-width="74.3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68.06pt"/>
    </style:style>
    <style:style style:name="co10" style:family="table-column">
      <style:table-column-properties fo:break-before="auto" style:column-width="77.81pt"/>
    </style:style>
    <style:style style:name="co11" style:family="table-column">
      <style:table-column-properties fo:break-before="auto" style:column-width="120.84pt"/>
    </style:style>
    <style:style style:name="co12" style:family="table-column">
      <style:table-column-properties fo:break-before="auto" style:column-width="80.56pt"/>
    </style:style>
    <style:style style:name="co13" style:family="table-column">
      <style:table-column-properties fo:break-before="auto" style:column-width="125.01pt"/>
    </style:style>
    <style:style style:name="co14" style:family="table-column">
      <style:table-column-properties fo:break-before="auto" style:column-width="61.8pt"/>
    </style:style>
    <style:style style:name="co15" style:family="table-column">
      <style:table-column-properties fo:break-before="auto" style:column-width="144.45pt"/>
    </style:style>
    <style:style style:name="co16" style:family="table-column">
      <style:table-column-properties fo:break-before="auto" style:column-width="86.85pt"/>
    </style:style>
    <style:style style:name="co17" style:family="table-column">
      <style:table-column-properties fo:break-before="auto" style:column-width="177.79pt"/>
    </style:style>
    <style:style style:name="co18" style:family="table-column">
      <style:table-column-properties fo:break-before="auto" style:column-width="65.31pt"/>
    </style:style>
    <style:style style:name="co19" style:family="table-column">
      <style:table-column-properties fo:break-before="auto" style:column-width="88.21pt"/>
    </style:style>
    <style:style style:name="co20" style:family="table-column">
      <style:table-column-properties fo:break-before="auto" style:column-width="43.06pt"/>
    </style:style>
    <style:style style:name="co21" style:family="table-column">
      <style:table-column-properties fo:break-before="auto" style:column-width="77.1pt"/>
    </style:style>
    <style:style style:name="co22" style:family="table-column">
      <style:table-column-properties fo:break-before="auto" style:column-width="70.16pt"/>
    </style:style>
    <style:style style:name="co23" style:family="table-column">
      <style:table-column-properties fo:break-before="auto" style:column-width="88.89pt"/>
    </style:style>
    <style:style style:name="co24" style:family="table-column">
      <style:table-column-properties fo:break-before="auto" style:column-width="73.59pt"/>
    </style:style>
    <style:style style:name="co25" style:family="table-column">
      <style:table-column-properties fo:break-before="auto" style:column-width="109.76pt"/>
    </style:style>
    <style:style style:name="co26" style:family="table-column">
      <style:table-column-properties fo:break-before="auto" style:column-width="81.95pt"/>
    </style:style>
    <style:style style:name="co27" style:family="table-column">
      <style:table-column-properties fo:break-before="auto" style:column-width="109.05pt"/>
    </style:style>
    <style:style style:name="co28" style:family="table-column">
      <style:table-column-properties fo:break-before="auto" style:column-width="185.44pt"/>
    </style:style>
    <style:style style:name="co29" style:family="table-column">
      <style:table-column-properties fo:break-before="auto" style:column-width="84.05pt"/>
    </style:style>
    <style:style style:name="co30" style:family="table-column">
      <style:table-column-properties fo:break-before="auto" style:column-width="103.49pt"/>
    </style:style>
    <style:style style:name="co31" style:family="table-column">
      <style:table-column-properties fo:break-before="auto" style:column-width="92.41pt"/>
    </style:style>
    <style:style style:name="co32" style:family="table-column">
      <style:table-column-properties fo:break-before="auto" style:column-width="95.16pt"/>
    </style:style>
    <style:style style:name="co33" style:family="table-column">
      <style:table-column-properties fo:break-before="auto" style:column-width="75pt"/>
    </style:style>
    <style:style style:name="co34" style:family="table-column">
      <style:table-column-properties fo:break-before="auto" style:column-width="91.64pt"/>
    </style:style>
    <style:style style:name="co35" style:family="table-column">
      <style:table-column-properties fo:break-before="auto" style:column-width="84.76pt"/>
    </style:style>
    <style:style style:name="co36" style:family="table-column">
      <style:table-column-properties fo:break-before="auto" style:column-width="96.55pt"/>
    </style:style>
    <style:style style:name="co37" style:family="table-column">
      <style:table-column-properties fo:break-before="auto" style:column-width="83.34pt"/>
    </style:style>
    <style:style style:name="co38" style:family="table-column">
      <style:table-column-properties fo:break-before="auto" style:column-width="175.01pt"/>
    </style:style>
    <style:style style:name="co39" style:family="table-column">
      <style:table-column-properties fo:break-before="auto" style:column-width="79.14pt"/>
    </style:style>
    <style:style style:name="co40" style:family="table-column">
      <style:table-column-properties fo:break-before="auto" style:column-width="35.46pt"/>
    </style:style>
    <style:style style:name="co41" style:family="table-column">
      <style:table-column-properties fo:break-before="auto" style:column-width="69.45pt"/>
    </style:style>
    <style:style style:name="co42" style:family="table-column">
      <style:table-column-properties fo:break-before="auto" style:column-width="54.91pt"/>
    </style:style>
    <style:style style:name="co43" style:family="table-column">
      <style:table-column-properties fo:break-before="auto" style:column-width="82.66pt"/>
    </style:style>
    <style:style style:name="co44" style:family="table-column">
      <style:table-column-properties fo:break-before="auto" style:column-width="156.25pt"/>
    </style:style>
    <style:style style:name="co45" style:family="table-column">
      <style:table-column-properties fo:break-before="auto" style:column-width="45.84pt"/>
    </style:style>
    <style:style style:name="co46" style:family="table-column">
      <style:table-column-properties fo:break-before="auto" style:column-width="45.16pt"/>
    </style:style>
    <style:style style:name="co47" style:family="table-column">
      <style:table-column-properties fo:break-before="auto" style:column-width="78.49pt"/>
    </style:style>
    <style:style style:name="co48" style:family="table-column">
      <style:table-column-properties fo:break-before="auto" style:column-width="76.39pt"/>
    </style:style>
    <style:style style:name="co49" style:family="table-column">
      <style:table-column-properties fo:break-before="auto" style:column-width="90.99pt"/>
    </style:style>
    <style:style style:name="co50" style:family="table-column">
      <style:table-column-properties fo:break-before="auto" style:column-width="127.11pt"/>
    </style:style>
    <style:style style:name="co51" style:family="table-column">
      <style:table-column-properties fo:break-before="auto" style:column-width="126.4pt"/>
    </style:style>
    <style:style style:name="co52" style:family="table-column">
      <style:table-column-properties fo:break-before="auto" style:column-width="129.15pt"/>
    </style:style>
    <style:style style:name="co53" style:family="table-column">
      <style:table-column-properties fo:break-before="auto" style:column-width="90.31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ROGRAM">
      <style:table-properties table:display="true" style:writing-mode="lr-tb"/>
    </style:style>
    <style:style style:name="ta2" style:family="table" style:master-page-name="PageStyle_5f_DATAKONSUME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ackground-color="#f779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a4c2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779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1155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7797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13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131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131">
      <style:table-cell-properties fo:background-color="#f779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131">
      <style:table-cell-properties fo:background-color="#a4c2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4">
      <style:table-cell-properties fo:background-color="#38761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3">
      <style:table-cell-properties fo:background-color="#3876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fo:background-color="#f779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fo:background-color="#f779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a4c2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3876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">
      <style:table-cell-properties fo:background-color="#3876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4">
      <style:table-cell-properties fo:background-color="#3876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8f9f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5ec1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4" table:default-cell-style-name="Default"/>
        <table:table-column table:style-name="co34" table:default-cell-style-name="Default"/>
        <table:table-column table:style-name="co40" table:number-columns-repeated="3" table:default-cell-style-name="Default"/>
        <table:table-column table:style-name="co22" table:number-columns-repeated="968" table:default-cell-style-name="Default"/>
        <table:table-row table:style-name="ro1">
          <table:table-cell table:style-name="ce1" office:value-type="string" calcext:value-type="string">
            <text:p>Tgl Aktifitas</text:p>
          </table:table-cell>
          <table:table-cell table:style-name="ce1" office:value-type="string" calcext:value-type="string">
            <text:p>User ID</text:p>
          </table:table-cell>
          <table:table-cell table:style-name="ce1" office:value-type="string" calcext:value-type="string">
            <text:p>Hari Ke</text:p>
          </table:table-cell>
          <table:table-cell table:style-name="ce12" office:value-type="string" calcext:value-type="string">
            <text:p>Target Program</text:p>
          </table:table-cell>
          <table:table-cell table:style-name="ce12" office:value-type="string" calcext:value-type="string">
            <text:p>Nama Konsumen</text:p>
          </table:table-cell>
          <table:table-cell table:style-name="ce13" office:value-type="string" calcext:value-type="string">
            <text:p>Materi</text:p>
          </table:table-cell>
          <table:table-cell table:style-name="ce14" office:value-type="string" calcext:value-type="string">
            <text:p>Sarapan</text:p>
          </table:table-cell>
          <table:table-cell table:style-name="ce14" office:value-type="string" calcext:value-type="string">
            <text:p>Link Sarapan</text:p>
          </table:table-cell>
          <table:table-cell table:style-name="ce14" office:value-type="string" calcext:value-type="string">
            <text:p>Cemilan Pagi</text:p>
          </table:table-cell>
          <table:table-cell table:style-name="ce14" office:value-type="string" calcext:value-type="string">
            <text:p>Link CemilanPagi</text:p>
          </table:table-cell>
          <table:table-cell table:style-name="ce14" office:value-type="string" calcext:value-type="string">
            <text:p>Makan Siang</text:p>
          </table:table-cell>
          <table:table-cell table:style-name="ce14" office:value-type="string" calcext:value-type="string">
            <text:p>Link MakanSiang</text:p>
          </table:table-cell>
          <table:table-cell table:style-name="ce14" office:value-type="string" calcext:value-type="string">
            <text:p>Cemilan Sore</text:p>
          </table:table-cell>
          <table:table-cell table:style-name="ce14" office:value-type="string" calcext:value-type="string">
            <text:p>Link CemilanSore</text:p>
          </table:table-cell>
          <table:table-cell table:style-name="ce14" office:value-type="string" calcext:value-type="string">
            <text:p>Makan Malam</text:p>
          </table:table-cell>
          <table:table-cell table:style-name="ce14" office:value-type="string" calcext:value-type="string">
            <text:p>Link MakanMalam</text:p>
          </table:table-cell>
          <table:table-cell table:style-name="ce13" office:value-type="string" calcext:value-type="string">
            <text:p>Meal Plan</text:p>
          </table:table-cell>
          <table:table-cell table:style-name="ce14" office:value-type="string" calcext:value-type="string">
            <text:p>Kardio</text:p>
          </table:table-cell>
          <table:table-cell table:style-name="ce14" office:value-type="string" calcext:value-type="string">
            <text:p>Link Kardio</text:p>
          </table:table-cell>
          <table:table-cell table:style-name="ce14" office:value-type="string" calcext:value-type="string">
            <text:p>Durasi Start</text:p>
          </table:table-cell>
          <table:table-cell table:style-name="ce14" office:value-type="string" calcext:value-type="string">
            <text:p>Durasi Stop</text:p>
          </table:table-cell>
          <table:table-cell table:style-name="ce14" office:value-type="string" calcext:value-type="string">
            <text:p>Resisten</text:p>
          </table:table-cell>
          <table:table-cell table:style-name="ce14" office:value-type="string" calcext:value-type="string">
            <text:p>Jumlah Set</text:p>
          </table:table-cell>
          <table:table-cell table:style-name="ce14" office:value-type="string" calcext:value-type="string">
            <text:p>Jumlah Repetisi</text:p>
          </table:table-cell>
          <table:table-cell table:style-name="ce14" office:value-type="string" calcext:value-type="string">
            <text:p>Durasi Menit</text:p>
          </table:table-cell>
          <table:table-cell table:style-name="ce13" office:value-type="string" calcext:value-type="string">
            <text:p>Workout</text:p>
          </table:table-cell>
          <table:table-cell table:style-name="ce14" office:value-type="string" calcext:value-type="string">
            <text:p>Asupan Air</text:p>
          </table:table-cell>
          <table:table-cell table:style-name="ce13" office:value-type="string" calcext:value-type="string">
            <text:p>Water</text:p>
          </table:table-cell>
          <table:table-cell table:style-name="ce14" office:value-type="string" calcext:value-type="string">
            <text:p>Waktu</text:p>
          </table:table-cell>
          <table:table-cell table:style-name="ce14" office:value-type="string" calcext:value-type="string">
            <text:p>Jam</text:p>
          </table:table-cell>
          <table:table-cell table:style-name="ce13" office:value-type="string" calcext:value-type="string">
            <text:p>Istirahat</text:p>
          </table:table-cell>
          <table:table-cell table:style-name="ce25" office:value-type="string" calcext:value-type="string">
            <text:p>Jenis Kelamin</text:p>
          </table:table-cell>
          <table:table-cell table:style-name="ce25" office:value-type="string" calcext:value-type="string">
            <text:p>Usia</text:p>
          </table:table-cell>
          <table:table-cell table:style-name="ce25" office:value-type="string" calcext:value-type="string">
            <text:p>Tinggi Badan (cm)</text:p>
          </table:table-cell>
          <table:table-cell table:style-name="ce25" office:value-type="string" calcext:value-type="string">
            <text:p>Berat Badan (cm)</text:p>
          </table:table-cell>
          <table:table-cell table:style-name="ce25" office:value-type="string" calcext:value-type="string">
            <text:p>Linkar Perut (cm)</text:p>
          </table:table-cell>
          <table:table-cell table:style-name="ce25" office:value-type="string" calcext:value-type="string">
            <text:p>Aktivitas Fisik</text:p>
          </table:table-cell>
          <table:table-cell table:style-name="ce26" office:value-type="string" calcext:value-type="string">
            <text:p>BB Ideal kg</text:p>
          </table:table-cell>
          <table:table-cell table:style-name="ce27" office:value-type="string" calcext:value-type="string">
            <text:p>IMT (kg/m²)</text:p>
          </table:table-cell>
          <table:table-cell table:style-name="ce34" office:value-type="string" calcext:value-type="string">
            <text:p>Lemak Tubuh (%)</text:p>
          </table:table-cell>
          <table:table-cell table:style-name="ce35" office:value-type="string" calcext:value-type="string">
            <text:p>Lemak Perut</text:p>
          </table:table-cell>
          <table:table-cell table:style-name="ce35" office:value-type="string" calcext:value-type="string">
            <text:p>Massa Otot (kg)</text:p>
          </table:table-cell>
          <table:table-cell table:style-name="ce34" office:value-type="string" calcext:value-type="string">
            <text:p>BMR (kcal/hari)</text:p>
          </table:table-cell>
          <table:table-cell table:style-name="ce36" office:value-type="string" calcext:value-type="string">
            <text:p>Kalori (kcal/hari)</text:p>
          </table:table-cell>
          <table:table-cell table:style-name="ce36" office:value-type="string" calcext:value-type="string">
            <text:p>Protein (gr/hari)</text:p>
          </table:table-cell>
          <table:table-cell table:style-name="ce34" office:value-type="string" calcext:value-type="string">
            <text:p>Total Skoring </text:p>
          </table:table-cell>
          <table:table-cell table:style-name="ce34" office:value-type="string" calcext:value-type="string">
            <text:p>Kesimpulan</text:p>
          </table:table-cell>
          <table:table-cell table:style-name="ce34" office:value-type="string" calcext:value-type="string">
            <text:p>Rekomendasi</text:p>
          </table:table-cell>
          <table:table-cell table:style-name="ce37" office:value-type="string" calcext:value-type="string">
            <text:p>Data Tracking</text:p>
          </table:table-cell>
          <table:table-cell table:style-name="ce37" office:value-type="string" calcext:value-type="string">
            <text:p>Tanya Coach</text:p>
          </table:table-cell>
          <table:table-cell table:style-name="ce37" office:value-type="string" calcext:value-type="string">
            <text:p>Selesai Modul</text:p>
          </table:table-cell>
          <table:table-cell table:style-name="ce34" office:value-type="string" calcext:value-type="string">
            <text:p>Jumlah Point</text:p>
          </table:table-cell>
          <table:table-cell table:style-name="ce38" office:value-type="string" calcext:value-type="string">
            <text:p>Link</text:p>
          </table:table-cell>
          <table:table-cell table:style-name="ce9" table:number-columns-repeated="2"/>
          <table:table-cell table:style-name="ce39"/>
          <table:table-cell table:number-columns-repeated="968"/>
        </table:table-row>
        <table:table-row table:style-name="ro2" table:visibility="collapse">
          <table:table-cell table:style-name="ce2" office:value-type="date" office:date-value="2026-01-07T10:50:52.927" calcext:value-type="date">
            <text:p>1/7/2026 10:50:53</text:p>
          </table:table-cell>
          <table:table-cell table:style-name="ce7" office:value-type="string" calcext:value-type="string">
            <text:p>hestyhus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hesty husain rauf</text:p>
          </table:table-cell>
          <table:table-cell table:style-name="ce7" office:value-type="string" calcext:value-type="string">
            <text:p>OK</text:p>
          </table:table-cell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20" table:number-columns-repeated="2"/>
          <table:table-cell table:style-name="ce15" table:number-columns-repeated="4"/>
          <table:table-cell table:style-name="ce7" table:number-columns-repeated="13"/>
          <table:table-cell table:style-name="ce28"/>
          <table:table-cell table:style-name="ce7" table:number-columns-repeated="12"/>
          <table:table-cell/>
          <table:table-cell table:style-name="ce9" table:number-columns-repeated="4"/>
          <table:table-cell table:number-columns-repeated="968"/>
        </table:table-row>
        <table:table-row table:style-name="ro2">
          <table:table-cell table:style-name="ce2" office:value-type="date" office:date-value="2026-01-08T15:10:36.686" calcext:value-type="date">
            <text:p>1/8/2026 15:10:37</text:p>
          </table:table-cell>
          <table:table-cell table:style-name="ce7" office:value-type="string" calcext:value-type="string">
            <text:p>assidik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assidik</text:p>
          </table:table-cell>
          <table:table-cell table:style-name="ce7" office:value-type="string" calcext:value-type="string">
            <text:p>OK</text:p>
          </table:table-cell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style-name="ce21" table:number-columns-repeated="2"/>
          <table:table-cell table:style-name="ce7" table:number-columns-repeated="17"/>
          <table:table-cell table:style-name="ce28"/>
          <table:table-cell table:style-name="ce7" table:number-columns-repeated="13"/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17T20:27:23.527" calcext:value-type="date">
            <text:p>6/17/2026 20:27:24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YUMx1cMoho2WKMRcXrFGU-SZUhdG7eXp/view?usp=drivesdk" xlink:type="simple">https://drive.google.com/file/d/1YUMx1cMoho2WKMRcXrFGU-SZUhdG7eXp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5KuKyzRBFbn7poOYF8WWD5X8basAxJKI/view?usp=drivesdk" xlink:type="simple">https://drive.google.com/file/d/15KuKyzRBFbn7poOYF8WWD5X8basAxJK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3N89zeygnnTn0eFr27EoUGx4OTIB01SQ/view?usp=drivesdk" xlink:type="simple">https://drive.google.com/file/d/13N89zeygnnTn0eFr27EoUGx4OTIB01SQ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7yE81eAeD7TNMCHlCe8OilxFTWv4z3RM/view?usp=drivesdk" xlink:type="simple">https://drive.google.com/file/d/17yE81eAeD7TNMCHlCe8OilxFTWv4z3RM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pvIJBbn4X3DrB-7GkG0BmGKBhRoLpB9V/view?usp=drivesdk" xlink:type="simple">https://drive.google.com/file/d/1pvIJBbn4X3DrB-7GkG0BmGKBhRoLpB9V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Lari</text:p>
          </table:table-cell>
          <table:table-cell table:style-name="ce16" office:value-type="string" calcext:value-type="string">
            <text:p><text:a xlink:href="https://drive.google.com/file/d/1fiCe5X2xJSDWGtxFMqGawJdJxsEtRZSt/view?usp=drivesdk" xlink:type="simple">https://drive.google.com/file/d/1fiCe5X2xJSDWGtxFMqGawJdJxsEtRZSt/view?usp=drivesdk</text:a></text:p>
          </table:table-cell>
          <table:table-cell table:style-name="ce22" office:value-type="time" office:time-value="PT20H23M00S" calcext:value-type="time">
            <text:p>20:23</text:p>
          </table:table-cell>
          <table:table-cell table:style-name="ce22" office:value-type="time" office:time-value="PT21H00M00S" calcext:value-type="time">
            <text:p>21:00</text:p>
          </table:table-cell>
          <table:table-cell table:style-name="ce8" office:value-type="string" calcext:value-type="string">
            <text:p>Squa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urang dari 1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0H25M00S" calcext:value-type="time">
            <text:p>20:25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ria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Sedikit/Tidak Olahraga</text:p>
          </table:table-cell>
          <table:table-cell table:style-name="ce8" office:value-type="float" office:value="63" calcext:value-type="float">
            <text:p>63</text:p>
          </table:table-cell>
          <table:table-cell table:style-name="ce29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374" calcext:value-type="float">
            <text:p>1374</text:p>
          </table:table-cell>
          <table:table-cell table:style-name="ce8" office:value-type="float" office:value="1649" calcext:value-type="float">
            <text:p>164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erlu perbaikan</text:p>
          </table:table-cell>
          <table:table-cell table:style-name="ce8" office:value-type="string" calcext:value-type="string">
            <text:p>Perbaiki pola makan dan aktivitas fisi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 table:visibility="collapse">
          <table:table-cell table:style-name="ce4" office:value-type="date" office:date-value="2026-01-21T10:48:27.507" calcext:value-type="date">
            <text:p>1/21/2026 10:48:28</text:p>
          </table:table-cell>
          <table:table-cell table:style-name="ce9" office:value-type="string" calcext:value-type="string">
            <text:p>alghazal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muh alghazali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02T15:37:27.953" calcext:value-type="date">
            <text:p>4/2/2026 15:37:28</text:p>
          </table:table-cell>
          <table:table-cell table:style-name="ce9" office:value-type="string" calcext:value-type="string">
            <text:p>test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amin1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5" office:value-type="date" office:date-value="2026-04-07T14:19:39.163" calcext:value-type="date">
            <text:p>4/7/2026 14:19:39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ARawkQgw9c3ulDpDXK_B4duBxWfXa0fL/view?usp=drivesdk" xlink:type="simple">https://drive.google.com/file/d/1ARawkQgw9c3ulDpDXK_B4duBxWfXa0fL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62aE81JfRXlhVErqcnSsz1eAAbkbZmyM/view?usp=drivesdk" xlink:type="simple">https://drive.google.com/file/d/162aE81JfRXlhVErqcnSsz1eAAbkbZmyM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2SZQstAQ4KQFVU1YUuC3D5_EdvLq9ehB/view?usp=drivesdk" xlink:type="simple">https://drive.google.com/file/d/12SZQstAQ4KQFVU1YUuC3D5_EdvLq9ehB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9u617s4tCB9WUo5oO1fqMJoY03fCNlai/view?usp=drivesdk" xlink:type="simple">https://drive.google.com/file/d/19u617s4tCB9WUo5oO1fqMJoY03fCNla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vzLjvq_7PQqNc3fWuE1j-b2sGawbA49V/view?usp=drivesdk" xlink:type="simple">https://drive.google.com/file/d/1vzLjvq_7PQqNc3fWuE1j-b2sGawbA49V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epeda</text:p>
          </table:table-cell>
          <table:table-cell table:style-name="ce18" office:value-type="string" calcext:value-type="string">
            <text:p><text:a xlink:href="https://drive.google.com/file/d/1KZOOXiymwG450lxooNcuCIf19UBnp2mR/view?usp=drivesdk" xlink:type="simple">https://drive.google.com/file/d/1KZOOXiymwG450lxooNcuCIf19UBnp2mR/view?usp=drivesdk</text:a></text:p>
          </table:table-cell>
          <table:table-cell table:style-name="ce23" office:value-type="time" office:time-value="PT11H51M00S" calcext:value-type="time">
            <text:p>11:51</text:p>
          </table:table-cell>
          <table:table-cell table:style-name="ce23" office:value-type="time" office:time-value="PT01H51M00S" calcext:value-type="time">
            <text:p>1:51</text:p>
          </table:table-cell>
          <table:table-cell table:style-name="ce10" office:value-type="string" calcext:value-type="string">
            <text:p>Plank, Squa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Kurang dari 1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14H10M00S" calcext:value-type="time">
            <text:p>14:10</text:p>
          </table:table-cell>
          <table:table-cell table:style-name="ce10" office:value-type="string" calcext:value-type="string">
            <text:p>Lebih dari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0" calcext:value-type="float">
            <text:p>60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3T06:43:11.677" calcext:value-type="date">
            <text:p>6/13/2026 6:43:12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epeda</text:p>
          </table:table-cell>
          <table:table-cell table:style-name="ce18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3" office:value-type="time" office:time-value="PT20H11M00S" calcext:value-type="time">
            <text:p>20:11</text:p>
          </table:table-cell>
          <table:table-cell table:style-name="ce10" office:value-type="string" calcext:value-type="string">
            <text:p>Lunge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00M00S" calcext:value-type="time">
            <text:p>22:00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3T09:43:04.511" calcext:value-type="date">
            <text:p>6/13/2026 9:43:05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7AaaAcMpepTHOtOIFIeZqYQ0abdbDFMR/view?usp=drivesdk" xlink:type="simple">https://drive.google.com/file/d/17AaaAcMpepTHOtOIFIeZqYQ0abdbDFMR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fBqWDbKqK2mF56PpuAXn00EuHn4Lyx-L/view?usp=drivesdk" xlink:type="simple">https://drive.google.com/file/d/1fBqWDbKqK2mF56PpuAXn00EuHn4Lyx-L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whStox15zSsipkmG8kxcYm6BOCSqTQrJ/view?usp=drivesdk" xlink:type="simple">https://drive.google.com/file/d/1whStox15zSsipkmG8kxcYm6BOCSqTQrJ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TgdSXnnyRlq3-uV4ySVQC74jIsrLqKsf/view?usp=drivesdk" xlink:type="simple">https://drive.google.com/file/d/1TgdSXnnyRlq3-uV4ySVQC74jIsrLqKsf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J0GOJqqeIho0psJm6LPHF0vo2CsGaPjX/view?usp=drivesdk" xlink:type="simple">https://drive.google.com/file/d/1J0GOJqqeIho0psJm6LPHF0vo2CsGaPjX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ari</text:p>
          </table:table-cell>
          <table:table-cell table:style-name="ce18" office:value-type="string" calcext:value-type="string">
            <text:p><text:a xlink:href="https://drive.google.com/file/d/1VB_4OeF3hB-8dzooLzTNNLsVeR4djwB0/view?usp=drivesdk" xlink:type="simple">https://drive.google.com/file/d/1VB_4OeF3hB-8dzooLzTNNLsVeR4djwB0/view?usp=drivesdk</text:a></text:p>
          </table:table-cell>
          <table:table-cell table:style-name="ce23" office:value-type="time" office:time-value="PT08H44M00S" calcext:value-type="time">
            <text:p>8:44</text:p>
          </table:table-cell>
          <table:table-cell table:style-name="ce23" office:value-type="time" office:time-value="PT09H49M00S" calcext:value-type="time">
            <text:p>9:49</text:p>
          </table:table-cell>
          <table:table-cell table:style-name="ce10" office:value-type="string" calcext:value-type="string">
            <text:p>Sit U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Kurang dari 1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10H00M00S" calcext:value-type="time">
            <text:p>10:00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3T20:40:50.133" calcext:value-type="date">
            <text:p>6/13/2026 20:40:50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K2xvdCOIO4nh7MAT4a8rRwAvmqYpchB4/view?usp=drivesdk" xlink:type="simple">https://drive.google.com/file/d/1K2xvdCOIO4nh7MAT4a8rRwAvmqYpchB4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62gHmQ75_hDIzHp_Y1VLlycMHpSYoeLB/view?usp=drivesdk" xlink:type="simple">https://drive.google.com/file/d/162gHmQ75_hDIzHp_Y1VLlycMHpSYoeLB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Xbslv1aeF1sHqSQsD47gDJtVEFnTQczX/view?usp=drivesdk" xlink:type="simple">https://drive.google.com/file/d/1Xbslv1aeF1sHqSQsD47gDJtVEFnTQczX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aFUDSWegdwDBSl4gBR3Zv9zl3L2IKa7q/view?usp=drivesdk" xlink:type="simple">https://drive.google.com/file/d/1aFUDSWegdwDBSl4gBR3Zv9zl3L2IKa7q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RblEs4_20JAztINPNJdu_aMvaPnceE3i/view?usp=drivesdk" xlink:type="simple">https://drive.google.com/file/d/1RblEs4_20JAztINPNJdu_aMvaPnceE3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ari</text:p>
          </table:table-cell>
          <table:table-cell table:style-name="ce18" office:value-type="string" calcext:value-type="string">
            <text:p><text:a xlink:href="https://drive.google.com/file/d/1pL5gDom2aS5_5lut9mt8-y0NYijVVsxM/view?usp=drivesdk" xlink:type="simple">https://drive.google.com/file/d/1pL5gDom2aS5_5lut9mt8-y0NYijVVsxM/view?usp=drivesdk</text:a></text:p>
          </table:table-cell>
          <table:table-cell table:style-name="ce23" office:value-type="time" office:time-value="PT20H36M00S" calcext:value-type="time">
            <text:p>20:36</text:p>
          </table:table-cell>
          <table:table-cell table:style-name="ce23" office:value-type="time" office:time-value="PT21H36M00S" calcext:value-type="time">
            <text:p>21:36</text:p>
          </table:table-cell>
          <table:table-cell table:style-name="ce10" office:value-type="string" calcext:value-type="string">
            <text:p>Squat, Sit U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Kurang dari 1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37M00S" calcext:value-type="time">
            <text:p>22:37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3T20:40:50.133" calcext:value-type="date">
            <text:p>6/13/2026 20:40:50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K2xvdCOIO4nh7MAT4a8rRwAvmqYpchB4/view?usp=drivesdk" xlink:type="simple">https://drive.google.com/file/d/1K2xvdCOIO4nh7MAT4a8rRwAvmqYpchB4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62gHmQ75_hDIzHp_Y1VLlycMHpSYoeLB/view?usp=drivesdk" xlink:type="simple">https://drive.google.com/file/d/162gHmQ75_hDIzHp_Y1VLlycMHpSYoeLB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Xbslv1aeF1sHqSQsD47gDJtVEFnTQczX/view?usp=drivesdk" xlink:type="simple">https://drive.google.com/file/d/1Xbslv1aeF1sHqSQsD47gDJtVEFnTQczX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aFUDSWegdwDBSl4gBR3Zv9zl3L2IKa7q/view?usp=drivesdk" xlink:type="simple">https://drive.google.com/file/d/1aFUDSWegdwDBSl4gBR3Zv9zl3L2IKa7q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RblEs4_20JAztINPNJdu_aMvaPnceE3i/view?usp=drivesdk" xlink:type="simple">https://drive.google.com/file/d/1RblEs4_20JAztINPNJdu_aMvaPnceE3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ari</text:p>
          </table:table-cell>
          <table:table-cell table:style-name="ce18" office:value-type="string" calcext:value-type="string">
            <text:p><text:a xlink:href="https://drive.google.com/file/d/1pL5gDom2aS5_5lut9mt8-y0NYijVVsxM/view?usp=drivesdk" xlink:type="simple">https://drive.google.com/file/d/1pL5gDom2aS5_5lut9mt8-y0NYijVVsxM/view?usp=drivesdk</text:a></text:p>
          </table:table-cell>
          <table:table-cell table:style-name="ce23" office:value-type="time" office:time-value="PT20H36M00S" calcext:value-type="time">
            <text:p>20:36</text:p>
          </table:table-cell>
          <table:table-cell table:style-name="ce23" office:value-type="time" office:time-value="PT21H36M00S" calcext:value-type="time">
            <text:p>21:36</text:p>
          </table:table-cell>
          <table:table-cell table:style-name="ce10" office:value-type="string" calcext:value-type="string">
            <text:p>Squat, Sit U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Kurang dari 1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37M00S" calcext:value-type="time">
            <text:p>22:37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9" calcext:value-type="float">
            <text:p>163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3T20:40:50.133" calcext:value-type="date">
            <text:p>6/13/2026 20:40:50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K2xvdCOIO4nh7MAT4a8rRwAvmqYpchB4/view?usp=drivesdk" xlink:type="simple">https://drive.google.com/file/d/1K2xvdCOIO4nh7MAT4a8rRwAvmqYpchB4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62gHmQ75_hDIzHp_Y1VLlycMHpSYoeLB/view?usp=drivesdk" xlink:type="simple">https://drive.google.com/file/d/162gHmQ75_hDIzHp_Y1VLlycMHpSYoeLB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Xbslv1aeF1sHqSQsD47gDJtVEFnTQczX/view?usp=drivesdk" xlink:type="simple">https://drive.google.com/file/d/1Xbslv1aeF1sHqSQsD47gDJtVEFnTQczX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aFUDSWegdwDBSl4gBR3Zv9zl3L2IKa7q/view?usp=drivesdk" xlink:type="simple">https://drive.google.com/file/d/1aFUDSWegdwDBSl4gBR3Zv9zl3L2IKa7q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RblEs4_20JAztINPNJdu_aMvaPnceE3i/view?usp=drivesdk" xlink:type="simple">https://drive.google.com/file/d/1RblEs4_20JAztINPNJdu_aMvaPnceE3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ari</text:p>
          </table:table-cell>
          <table:table-cell table:style-name="ce18" office:value-type="string" calcext:value-type="string">
            <text:p><text:a xlink:href="https://drive.google.com/file/d/1pL5gDom2aS5_5lut9mt8-y0NYijVVsxM/view?usp=drivesdk" xlink:type="simple">https://drive.google.com/file/d/1pL5gDom2aS5_5lut9mt8-y0NYijVVsxM/view?usp=drivesdk</text:a></text:p>
          </table:table-cell>
          <table:table-cell table:style-name="ce23" office:value-type="time" office:time-value="PT20H36M00S" calcext:value-type="time">
            <text:p>20:36</text:p>
          </table:table-cell>
          <table:table-cell table:style-name="ce23" office:value-type="time" office:time-value="PT21H36M00S" calcext:value-type="time">
            <text:p>21:36</text:p>
          </table:table-cell>
          <table:table-cell table:style-name="ce10" office:value-type="string" calcext:value-type="string">
            <text:p>Squat, Sit U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Kurang dari 1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37M00S" calcext:value-type="time">
            <text:p>22:37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3T20:40:50.133" calcext:value-type="date">
            <text:p>6/13/2026 20:40:50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K2xvdCOIO4nh7MAT4a8rRwAvmqYpchB4/view?usp=drivesdk" xlink:type="simple">https://drive.google.com/file/d/1K2xvdCOIO4nh7MAT4a8rRwAvmqYpchB4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62gHmQ75_hDIzHp_Y1VLlycMHpSYoeLB/view?usp=drivesdk" xlink:type="simple">https://drive.google.com/file/d/162gHmQ75_hDIzHp_Y1VLlycMHpSYoeLB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Xbslv1aeF1sHqSQsD47gDJtVEFnTQczX/view?usp=drivesdk" xlink:type="simple">https://drive.google.com/file/d/1Xbslv1aeF1sHqSQsD47gDJtVEFnTQczX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aFUDSWegdwDBSl4gBR3Zv9zl3L2IKa7q/view?usp=drivesdk" xlink:type="simple">https://drive.google.com/file/d/1aFUDSWegdwDBSl4gBR3Zv9zl3L2IKa7q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RblEs4_20JAztINPNJdu_aMvaPnceE3i/view?usp=drivesdk" xlink:type="simple">https://drive.google.com/file/d/1RblEs4_20JAztINPNJdu_aMvaPnceE3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ari</text:p>
          </table:table-cell>
          <table:table-cell table:style-name="ce18" office:value-type="string" calcext:value-type="string">
            <text:p><text:a xlink:href="https://drive.google.com/file/d/1pL5gDom2aS5_5lut9mt8-y0NYijVVsxM/view?usp=drivesdk" xlink:type="simple">https://drive.google.com/file/d/1pL5gDom2aS5_5lut9mt8-y0NYijVVsxM/view?usp=drivesdk</text:a></text:p>
          </table:table-cell>
          <table:table-cell table:style-name="ce23" office:value-type="time" office:time-value="PT20H36M00S" calcext:value-type="time">
            <text:p>20:36</text:p>
          </table:table-cell>
          <table:table-cell table:style-name="ce23" office:value-type="time" office:time-value="PT21H36M00S" calcext:value-type="time">
            <text:p>21:36</text:p>
          </table:table-cell>
          <table:table-cell table:style-name="ce10" office:value-type="string" calcext:value-type="string">
            <text:p>Squat, Sit U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Kurang dari 1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37M00S" calcext:value-type="time">
            <text:p>22:37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3T20:40:50.133" calcext:value-type="date">
            <text:p>6/13/2026 20:40:50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K2xvdCOIO4nh7MAT4a8rRwAvmqYpchB4/view?usp=drivesdk" xlink:type="simple">https://drive.google.com/file/d/1K2xvdCOIO4nh7MAT4a8rRwAvmqYpchB4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62gHmQ75_hDIzHp_Y1VLlycMHpSYoeLB/view?usp=drivesdk" xlink:type="simple">https://drive.google.com/file/d/162gHmQ75_hDIzHp_Y1VLlycMHpSYoeLB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Xbslv1aeF1sHqSQsD47gDJtVEFnTQczX/view?usp=drivesdk" xlink:type="simple">https://drive.google.com/file/d/1Xbslv1aeF1sHqSQsD47gDJtVEFnTQczX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aFUDSWegdwDBSl4gBR3Zv9zl3L2IKa7q/view?usp=drivesdk" xlink:type="simple">https://drive.google.com/file/d/1aFUDSWegdwDBSl4gBR3Zv9zl3L2IKa7q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RblEs4_20JAztINPNJdu_aMvaPnceE3i/view?usp=drivesdk" xlink:type="simple">https://drive.google.com/file/d/1RblEs4_20JAztINPNJdu_aMvaPnceE3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ari</text:p>
          </table:table-cell>
          <table:table-cell table:style-name="ce18" office:value-type="string" calcext:value-type="string">
            <text:p><text:a xlink:href="https://drive.google.com/file/d/1pL5gDom2aS5_5lut9mt8-y0NYijVVsxM/view?usp=drivesdk" xlink:type="simple">https://drive.google.com/file/d/1pL5gDom2aS5_5lut9mt8-y0NYijVVsxM/view?usp=drivesdk</text:a></text:p>
          </table:table-cell>
          <table:table-cell table:style-name="ce23" office:value-type="time" office:time-value="PT20H36M00S" calcext:value-type="time">
            <text:p>20:36</text:p>
          </table:table-cell>
          <table:table-cell table:style-name="ce23" office:value-type="time" office:time-value="PT21H36M00S" calcext:value-type="time">
            <text:p>21:36</text:p>
          </table:table-cell>
          <table:table-cell table:style-name="ce10" office:value-type="string" calcext:value-type="string">
            <text:p>Squat, Sit U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Kurang dari 1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37M00S" calcext:value-type="time">
            <text:p>22:37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3T20:40:50.133" calcext:value-type="date">
            <text:p>6/13/2026 20:40:50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K2xvdCOIO4nh7MAT4a8rRwAvmqYpchB4/view?usp=drivesdk" xlink:type="simple">https://drive.google.com/file/d/1K2xvdCOIO4nh7MAT4a8rRwAvmqYpchB4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62gHmQ75_hDIzHp_Y1VLlycMHpSYoeLB/view?usp=drivesdk" xlink:type="simple">https://drive.google.com/file/d/162gHmQ75_hDIzHp_Y1VLlycMHpSYoeLB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Xbslv1aeF1sHqSQsD47gDJtVEFnTQczX/view?usp=drivesdk" xlink:type="simple">https://drive.google.com/file/d/1Xbslv1aeF1sHqSQsD47gDJtVEFnTQczX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aFUDSWegdwDBSl4gBR3Zv9zl3L2IKa7q/view?usp=drivesdk" xlink:type="simple">https://drive.google.com/file/d/1aFUDSWegdwDBSl4gBR3Zv9zl3L2IKa7q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RblEs4_20JAztINPNJdu_aMvaPnceE3i/view?usp=drivesdk" xlink:type="simple">https://drive.google.com/file/d/1RblEs4_20JAztINPNJdu_aMvaPnceE3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ari</text:p>
          </table:table-cell>
          <table:table-cell table:style-name="ce18" office:value-type="string" calcext:value-type="string">
            <text:p><text:a xlink:href="https://drive.google.com/file/d/1pL5gDom2aS5_5lut9mt8-y0NYijVVsxM/view?usp=drivesdk" xlink:type="simple">https://drive.google.com/file/d/1pL5gDom2aS5_5lut9mt8-y0NYijVVsxM/view?usp=drivesdk</text:a></text:p>
          </table:table-cell>
          <table:table-cell table:style-name="ce23" office:value-type="time" office:time-value="PT20H36M00S" calcext:value-type="time">
            <text:p>20:36</text:p>
          </table:table-cell>
          <table:table-cell table:style-name="ce23" office:value-type="time" office:time-value="PT21H36M00S" calcext:value-type="time">
            <text:p>21:36</text:p>
          </table:table-cell>
          <table:table-cell table:style-name="ce10" office:value-type="string" calcext:value-type="string">
            <text:p>Squat, Sit U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Kurang dari 1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37M00S" calcext:value-type="time">
            <text:p>22:37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3T20:40:50.133" calcext:value-type="date">
            <text:p>6/13/2026 20:40:50</text:p>
          </table:table-cell>
          <table:table-cell table:style-name="ce10" office:value-type="string" calcext:value-type="string">
            <text:p>test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K2xvdCOIO4nh7MAT4a8rRwAvmqYpchB4/view?usp=drivesdk" xlink:type="simple">https://drive.google.com/file/d/1K2xvdCOIO4nh7MAT4a8rRwAvmqYpchB4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62gHmQ75_hDIzHp_Y1VLlycMHpSYoeLB/view?usp=drivesdk" xlink:type="simple">https://drive.google.com/file/d/162gHmQ75_hDIzHp_Y1VLlycMHpSYoeLB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Xbslv1aeF1sHqSQsD47gDJtVEFnTQczX/view?usp=drivesdk" xlink:type="simple">https://drive.google.com/file/d/1Xbslv1aeF1sHqSQsD47gDJtVEFnTQczX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aFUDSWegdwDBSl4gBR3Zv9zl3L2IKa7q/view?usp=drivesdk" xlink:type="simple">https://drive.google.com/file/d/1aFUDSWegdwDBSl4gBR3Zv9zl3L2IKa7q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RblEs4_20JAztINPNJdu_aMvaPnceE3i/view?usp=drivesdk" xlink:type="simple">https://drive.google.com/file/d/1RblEs4_20JAztINPNJdu_aMvaPnceE3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ari</text:p>
          </table:table-cell>
          <table:table-cell table:style-name="ce18" office:value-type="string" calcext:value-type="string">
            <text:p><text:a xlink:href="https://drive.google.com/file/d/1pL5gDom2aS5_5lut9mt8-y0NYijVVsxM/view?usp=drivesdk" xlink:type="simple">https://drive.google.com/file/d/1pL5gDom2aS5_5lut9mt8-y0NYijVVsxM/view?usp=drivesdk</text:a></text:p>
          </table:table-cell>
          <table:table-cell table:style-name="ce23" office:value-type="time" office:time-value="PT20H36M00S" calcext:value-type="time">
            <text:p>20:36</text:p>
          </table:table-cell>
          <table:table-cell table:style-name="ce23" office:value-type="time" office:time-value="PT21H36M00S" calcext:value-type="time">
            <text:p>21:36</text:p>
          </table:table-cell>
          <table:table-cell table:style-name="ce10" office:value-type="string" calcext:value-type="string">
            <text:p>Squat, Sit U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Kurang dari 1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37M00S" calcext:value-type="time">
            <text:p>22:37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5" calcext:value-type="float">
            <text:p>65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70" calcext:value-type="float">
            <text:p>167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17T20:31:27.863" calcext:value-type="date">
            <text:p>6/17/2026 20:31:28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mjyoXgM5lXmWsuoEzFc-U9u4HEemHgMn/view?usp=drivesdk" xlink:type="simple">https://drive.google.com/file/d/1mjyoXgM5lXmWsuoEzFc-U9u4HEemHgMn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_93H4o_plFaZHAgTg1SI2khHKqrMIOaW/view?usp=drivesdk" xlink:type="simple">https://drive.google.com/file/d/1_93H4o_plFaZHAgTg1SI2khHKqrMIOaW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OIzrdQ3Lguap6yNati_0crkgBt-Kx5qV/view?usp=drivesdk" xlink:type="simple">https://drive.google.com/file/d/1OIzrdQ3Lguap6yNati_0crkgBt-Kx5qV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yt8yVr0F583QwtbMVVKyC5CAs38Je7bM/view?usp=drivesdk" xlink:type="simple">https://drive.google.com/file/d/1yt8yVr0F583QwtbMVVKyC5CAs38Je7bM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zG_5TSK_k928phyPL0qQ6jEsXEIqMP2M/view?usp=drivesdk" xlink:type="simple">https://drive.google.com/file/d/1zG_5TSK_k928phyPL0qQ6jEsXEIqMP2M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Sepeda</text:p>
          </table:table-cell>
          <table:table-cell table:style-name="ce16" office:value-type="string" calcext:value-type="string">
            <text:p><text:a xlink:href="https://drive.google.com/file/d/1gp4Fl2KBoTee6X_j2apidbHh_anZFRSP/view?usp=drivesdk" xlink:type="simple">https://drive.google.com/file/d/1gp4Fl2KBoTee6X_j2apidbHh_anZFRSP/view?usp=drivesdk</text:a></text:p>
          </table:table-cell>
          <table:table-cell table:number-columns-repeated="2" table:style-name="ce22" office:value-type="time" office:time-value="PT20H28M00S" calcext:value-type="time">
            <text:p>20:28</text:p>
          </table:table-cell>
          <table:table-cell table:style-name="ce8" office:value-type="string" calcext:value-type="string">
            <text:p>Squat, Push Up, Sit Up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1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30M00S" calcext:value-type="time">
            <text:p>22:30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7"/>
          <table:table-cell table:style-name="ce29"/>
          <table:table-cell table:style-name="ce8" table:number-columns-repeated="10"/>
          <table:table-cell table:number-columns-repeated="2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17T20:35:12.193" calcext:value-type="date">
            <text:p>6/17/2026 20:35:12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ITlQ-Cwn-h0rNgvl5BqufrTL-F2frTse/view?usp=drivesdk" xlink:type="simple">https://drive.google.com/file/d/1ITlQ-Cwn-h0rNgvl5BqufrTL-F2frTse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ozl72rgiqtojUpGRw72E5fFvF46sHKFG/view?usp=drivesdk" xlink:type="simple">https://drive.google.com/file/d/1ozl72rgiqtojUpGRw72E5fFvF46sHKFG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MDvnGc0c_7Jk0wxOlOiuVecG5nYf09mt/view?usp=drivesdk" xlink:type="simple">https://drive.google.com/file/d/1MDvnGc0c_7Jk0wxOlOiuVecG5nYf09mt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RdkvhEtJe1rXVSYa1Chye75sylfXgnnO/view?usp=drivesdk" xlink:type="simple">https://drive.google.com/file/d/1RdkvhEtJe1rXVSYa1Chye75sylfXgnnO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h4W-xoF36tszSQ-jVQu_E7hULPfSmBqq/view?usp=drivesdk" xlink:type="simple">https://drive.google.com/file/d/1h4W-xoF36tszSQ-jVQu_E7hULPfSmBqq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Renang</text:p>
          </table:table-cell>
          <table:table-cell table:style-name="ce16" office:value-type="string" calcext:value-type="string">
            <text:p><text:a xlink:href="https://drive.google.com/file/d/1WVCB0Rx4PNqg8mcx7zAYArZhzGrKAMHz/view?usp=drivesdk" xlink:type="simple">https://drive.google.com/file/d/1WVCB0Rx4PNqg8mcx7zAYArZhzGrKAMHz/view?usp=drivesdk</text:a></text:p>
          </table:table-cell>
          <table:table-cell table:style-name="ce22" office:value-type="time" office:time-value="PT10H33M00S" calcext:value-type="time">
            <text:p>10:33</text:p>
          </table:table-cell>
          <table:table-cell table:style-name="ce22" office:value-type="time" office:time-value="PT11H33M00S" calcext:value-type="time">
            <text:p>11:33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1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34M00S" calcext:value-type="time">
            <text:p>22:34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7"/>
          <table:table-cell table:style-name="ce29"/>
          <table:table-cell table:style-name="ce8" table:number-columns-repeated="10"/>
          <table:table-cell table:number-columns-repeated="2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17T20:38:39.558" calcext:value-type="date">
            <text:p>6/17/2026 20:38:40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QVhl7oZetO9dNnP8rN_LQK2UEem2ZfCL/view?usp=drivesdk" xlink:type="simple">https://drive.google.com/file/d/1QVhl7oZetO9dNnP8rN_LQK2UEem2ZfCL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p4_LiNmJ5DqTiTmUJ0oXICr5C9YbUKVK/view?usp=drivesdk" xlink:type="simple">https://drive.google.com/file/d/1p4_LiNmJ5DqTiTmUJ0oXICr5C9YbUKVK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Ya99KfPzqEepJXXkecysNUkmSUlABAFj/view?usp=drivesdk" xlink:type="simple">https://drive.google.com/file/d/1Ya99KfPzqEepJXXkecysNUkmSUlABAFj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H_x-iLu0UjT095JRQmcy4oP5BdZmvqkV/view?usp=drivesdk" xlink:type="simple">https://drive.google.com/file/d/1H_x-iLu0UjT095JRQmcy4oP5BdZmvqkV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g3M2BMJcT55aQG0vdsU-CSnpCpHi6Bk2/view?usp=drivesdk" xlink:type="simple">https://drive.google.com/file/d/1g3M2BMJcT55aQG0vdsU-CSnpCpHi6Bk2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Renang</text:p>
          </table:table-cell>
          <table:table-cell table:style-name="ce16" office:value-type="string" calcext:value-type="string">
            <text:p><text:a xlink:href="https://drive.google.com/file/d/1xSJ90KPNZdAyP1HP-J83jw_7rUrn4s-V/view?usp=drivesdk" xlink:type="simple">https://drive.google.com/file/d/1xSJ90KPNZdAyP1HP-J83jw_7rUrn4s-V/view?usp=drivesdk</text:a></text:p>
          </table:table-cell>
          <table:table-cell table:style-name="ce22" office:value-type="time" office:time-value="PT10H36M00S" calcext:value-type="time">
            <text:p>10:36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8" office:value-type="string" calcext:value-type="string">
            <text:p>Plank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2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38M00S" calcext:value-type="time">
            <text:p>22:38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7"/>
          <table:table-cell table:style-name="ce29"/>
          <table:table-cell table:style-name="ce8" table:number-columns-repeated="10"/>
          <table:table-cell table:number-columns-repeated="2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23T17:26:14.363" calcext:value-type="date">
            <text:p>6/23/2026 17:26:14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iLees2Hkzdeq-j0BfjF3rhMRY316eeUd/view?usp=drivesdk" xlink:type="simple">https://drive.google.com/file/d/1iLees2Hkzdeq-j0BfjF3rhMRY316eeUd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0ja1BktR2gAcVfr9rrBSM4CWMf_j9OU0/view?usp=drivesdk" xlink:type="simple">https://drive.google.com/file/d/10ja1BktR2gAcVfr9rrBSM4CWMf_j9OU0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j54989qIwmu2OKa_6p_Zfgs4WoJdYoOv/view?usp=drivesdk" xlink:type="simple">https://drive.google.com/file/d/1j54989qIwmu2OKa_6p_Zfgs4WoJdYoOv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9zryyHZuOZlHksliPoVFMKwihsWj56_7/view?usp=drivesdk" xlink:type="simple">https://drive.google.com/file/d/19zryyHZuOZlHksliPoVFMKwihsWj56_7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-jy8MT7qg0BdQtcFvPWnQOpFzylbm42q/view?usp=drivesdk" xlink:type="simple">https://drive.google.com/file/d/1-jy8MT7qg0BdQtcFvPWnQOpFzylbm42q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Lari</text:p>
          </table:table-cell>
          <table:table-cell table:style-name="ce16" office:value-type="string" calcext:value-type="string">
            <text:p><text:a xlink:href="https://drive.google.com/file/d/1GLG-GVemj8qiv1m3mRGd8but7Oz1gxkv/view?usp=drivesdk" xlink:type="simple">https://drive.google.com/file/d/1GLG-GVemj8qiv1m3mRGd8but7Oz1gxkv/view?usp=drivesdk</text:a></text:p>
          </table:table-cell>
          <table:table-cell table:style-name="ce22" office:value-type="time" office:time-value="PT10H40M00S" calcext:value-type="time">
            <text:p>10:40</text:p>
          </table:table-cell>
          <table:table-cell table:style-name="ce22" office:value-type="time" office:time-value="PT12H40M00S" calcext:value-type="time">
            <text:p>12:40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1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41M00S" calcext:value-type="time">
            <text:p>22:41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ria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Sedikit/Tidak Olahraga</text:p>
          </table:table-cell>
          <table:table-cell table:style-name="ce8" office:value-type="float" office:value="63" calcext:value-type="float">
            <text:p>63</text:p>
          </table:table-cell>
          <table:table-cell table:style-name="ce29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374" calcext:value-type="float">
            <text:p>1374</text:p>
          </table:table-cell>
          <table:table-cell table:style-name="ce8" office:value-type="float" office:value="1649" calcext:value-type="float">
            <text:p>164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erlu perbaikan</text:p>
          </table:table-cell>
          <table:table-cell table:style-name="ce8" office:value-type="string" calcext:value-type="string">
            <text:p>Perbaiki pola makan dan aktivitas fisi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 table:visibility="collapse">
          <table:table-cell table:style-name="ce5" office:value-type="date" office:date-value="2026-06-19T16:07:11.667" calcext:value-type="date">
            <text:p>6/19/2026 16:07:12</text:p>
          </table:table-cell>
          <table:table-cell table:style-name="ce10" office:value-type="string" calcext:value-type="string">
            <text:p>alghaza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muh alghazali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Ilx5c547aLX2q9Sxr7yZMrEx_pKpDz0M/view?usp=drivesdk" xlink:type="simple">https://drive.google.com/file/d/1Ilx5c547aLX2q9Sxr7yZMrEx_pKpDz0M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BOQz6aA6W6mcAhQcr0xgh5HHN_cSNeBr/view?usp=drivesdk" xlink:type="simple">https://drive.google.com/file/d/1BOQz6aA6W6mcAhQcr0xgh5HHN_cSNeBr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dUleydlorcTmfR7MJmqL0sVJDl40Idtb/view?usp=drivesdk" xlink:type="simple">https://drive.google.com/file/d/1dUleydlorcTmfR7MJmqL0sVJDl40Idtb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yEmAqA77AZbyJvAO37v8-Tr6BmTJvF68/view?usp=drivesdk" xlink:type="simple">https://drive.google.com/file/d/1yEmAqA77AZbyJvAO37v8-Tr6BmTJvF68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g6CRu6KdFBFATbkGVxi0R1UBoFSms9MA/view?usp=drivesdk" xlink:type="simple">https://drive.google.com/file/d/1g6CRu6KdFBFATbkGVxi0R1UBoFSms9MA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ari</text:p>
          </table:table-cell>
          <table:table-cell table:style-name="ce18" office:value-type="string" calcext:value-type="string">
            <text:p><text:a xlink:href="https://drive.google.com/file/d/1YQFvdrY_JE0hWGfb_5-G3Rv0KnZL9YA2/view?usp=drivesdk" xlink:type="simple">https://drive.google.com/file/d/1YQFvdrY_JE0hWGfb_5-G3Rv0KnZL9YA2/view?usp=drivesdk</text:a></text:p>
          </table:table-cell>
          <table:table-cell table:style-name="ce23" office:value-type="time" office:time-value="PT14H39M00S" calcext:value-type="time">
            <text:p>14:39</text:p>
          </table:table-cell>
          <table:table-cell table:style-name="ce23" office:value-type="time" office:time-value="PT15H39M00S" calcext:value-type="time">
            <text:p>15:39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39M00S" calcext:value-type="time">
            <text:p>22:39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2" office:value-type="date" office:date-value="2026-06-22" calcext:value-type="date">
            <text:p>22.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74" calcext:value-type="float">
            <text:p>1374</text:p>
          </table:table-cell>
          <table:table-cell table:style-name="ce10" office:value-type="float" office:value="1649" calcext:value-type="float">
            <text:p>164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24T10:18:17.036" calcext:value-type="date">
            <text:p>6/24/2026 10:18:17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-1hL88eZ5XCsFITaFvg34IPZMbQd7Aot/view?usp=drivesdk" xlink:type="simple">https://drive.google.com/file/d/1-1hL88eZ5XCsFITaFvg34IPZMbQd7Aot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9BLOajbCun_2UtIygj8lEBGu6kTFEKJo/view?usp=drivesdk" xlink:type="simple">https://drive.google.com/file/d/19BLOajbCun_2UtIygj8lEBGu6kTFEKJo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UxC1fMJibEh1UxMh3AxkaH37xNP3qBxr/view?usp=drivesdk" xlink:type="simple">https://drive.google.com/file/d/1UxC1fMJibEh1UxMh3AxkaH37xNP3qBxr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SCqWsgRoJe6RFjMXv9kSvL7NegDHQDO5/view?usp=drivesdk" xlink:type="simple">https://drive.google.com/file/d/1SCqWsgRoJe6RFjMXv9kSvL7NegDHQDO5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o3wslvx6CvYtinAZk9ecRgiIZkOrSaz0/view?usp=drivesdk" xlink:type="simple">https://drive.google.com/file/d/1o3wslvx6CvYtinAZk9ecRgiIZkOrSaz0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Lari</text:p>
          </table:table-cell>
          <table:table-cell table:style-name="ce16" office:value-type="string" calcext:value-type="string">
            <text:p><text:a xlink:href="https://drive.google.com/file/d/18a5zW2u18mTn4nZDpgRAWh1ZJ1BipvHg/view?usp=drivesdk" xlink:type="simple">https://drive.google.com/file/d/18a5zW2u18mTn4nZDpgRAWh1ZJ1BipvHg/view?usp=drivesdk</text:a></text:p>
          </table:table-cell>
          <table:table-cell table:style-name="ce22" office:value-type="time" office:time-value="PT10H11M00S" calcext:value-type="time">
            <text:p>10:11</text:p>
          </table:table-cell>
          <table:table-cell table:style-name="ce22" office:value-type="time" office:time-value="PT00H11M00S" calcext:value-type="time">
            <text:p>0:11</text:p>
          </table:table-cell>
          <table:table-cell table:style-name="ce8" office:value-type="string" calcext:value-type="string">
            <text:p>Squat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1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10H12M00S" calcext:value-type="time">
            <text:p>10:12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7"/>
          <table:table-cell table:style-name="ce29"/>
          <table:table-cell table:style-name="ce8" table:number-columns-repeated="10"/>
          <table:table-cell table:number-columns-repeated="2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4" office:value-type="date" office:date-value="2026-04-02T15:37:27.953" calcext:value-type="date">
            <text:p>4/2/2026 15:37:28</text:p>
          </table:table-cell>
          <table:table-cell table:style-name="ce9" office:value-type="string" calcext:value-type="string">
            <text:p>test2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amin2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03T15:37:28" calcext:value-type="date">
            <text:p>4/3/2026 15:37:28</text:p>
          </table:table-cell>
          <table:table-cell table:style-name="ce9" office:value-type="string" calcext:value-type="string">
            <text:p>test3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amin3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04T15:37:28" calcext:value-type="date">
            <text:p>4/4/2026 15:37:28</text:p>
          </table:table-cell>
          <table:table-cell table:style-name="ce9" office:value-type="string" calcext:value-type="string">
            <text:p>test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amin4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05T15:37:28" calcext:value-type="date">
            <text:p>4/5/2026 15:37:28</text:p>
          </table:table-cell>
          <table:table-cell table:style-name="ce9" office:value-type="string" calcext:value-type="string">
            <text:p>test5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amin5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06T15:37:28" calcext:value-type="date">
            <text:p>4/6/2026 15:37:28</text:p>
          </table:table-cell>
          <table:table-cell table:style-name="ce9" office:value-type="string" calcext:value-type="string">
            <text:p>test6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amin6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07T15:37:28" calcext:value-type="date">
            <text:p>4/7/2026 15:37:28</text:p>
          </table:table-cell>
          <table:table-cell table:style-name="ce9" office:value-type="string" calcext:value-type="string">
            <text:p>test7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amin7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08T15:37:28" calcext:value-type="date">
            <text:p>4/8/2026 15:37:28</text:p>
          </table:table-cell>
          <table:table-cell table:style-name="ce9" office:value-type="string" calcext:value-type="string">
            <text:p>test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hestiy8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09T15:37:28" calcext:value-type="date">
            <text:p>4/9/2026 15:37:28</text:p>
          </table:table-cell>
          <table:table-cell table:style-name="ce9" office:value-type="string" calcext:value-type="string">
            <text:p>test9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hestiy9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10T15:37:28" calcext:value-type="date">
            <text:p>4/10/2026 15:37:28</text:p>
          </table:table-cell>
          <table:table-cell table:style-name="ce9" office:value-type="string" calcext:value-type="string">
            <text:p>test10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hestiy10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11T15:37:28" calcext:value-type="date">
            <text:p>4/11/2026 15:37:28</text:p>
          </table:table-cell>
          <table:table-cell table:style-name="ce9" office:value-type="string" calcext:value-type="string">
            <text:p>test1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hestiy11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12T15:37:28" calcext:value-type="date">
            <text:p>4/12/2026 15:37:28</text:p>
          </table:table-cell>
          <table:table-cell table:style-name="ce9" office:value-type="string" calcext:value-type="string">
            <text:p>test12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hestiy12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13T15:37:28" calcext:value-type="date">
            <text:p>4/13/2026 15:37:28</text:p>
          </table:table-cell>
          <table:table-cell table:style-name="ce9" office:value-type="string" calcext:value-type="string">
            <text:p>test13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hestiy13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14T15:37:28" calcext:value-type="date">
            <text:p>4/14/2026 15:37:28</text:p>
          </table:table-cell>
          <table:table-cell table:style-name="ce9" office:value-type="string" calcext:value-type="string">
            <text:p>test1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hestiy14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4" office:value-type="date" office:date-value="2026-04-15T15:37:28" calcext:value-type="date">
            <text:p>4/15/2026 15:37:28</text:p>
          </table:table-cell>
          <table:table-cell table:style-name="ce9" office:value-type="string" calcext:value-type="string">
            <text:p>test15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hestiy15</text:p>
          </table:table-cell>
          <table:table-cell table:style-name="ce9" office:value-type="string" calcext:value-type="string">
            <text:p>OK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19"/>
          <table:table-cell table:style-name="ce30"/>
          <table:table-cell table:style-name="ce9" table:number-columns-repeated="17"/>
          <table:table-cell table:number-columns-repeated="968"/>
        </table:table-row>
        <table:table-row table:style-name="ro2">
          <table:table-cell table:style-name="ce3" office:value-type="date" office:date-value="2026-06-13T06:43:11.677" calcext:value-type="date">
            <text:p>6/13/2026 6:43:12</text:p>
          </table:table-cell>
          <table:table-cell table:style-name="ce8" office:value-type="string" calcext:value-type="string">
            <text:p>test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amin2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Sepeda</text:p>
          </table:table-cell>
          <table:table-cell table:style-name="ce16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2" office:value-type="time" office:time-value="PT20H11M00S" calcext:value-type="time">
            <text:p>20:11</text:p>
          </table:table-cell>
          <table:table-cell table:style-name="ce8" office:value-type="string" calcext:value-type="string">
            <text:p>Lunge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2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00M00S" calcext:value-type="time">
            <text:p>22:00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ri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Sedikit/Tidak Olahraga</text:p>
          </table:table-cell>
          <table:table-cell table:style-name="ce8" office:value-type="float" office:value="63" calcext:value-type="float">
            <text:p>63</text:p>
          </table:table-cell>
          <table:table-cell table:style-name="ce29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362" calcext:value-type="float">
            <text:p>1362</text:p>
          </table:table-cell>
          <table:table-cell table:style-name="ce8" office:value-type="float" office:value="1634" calcext:value-type="float">
            <text:p>163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rlu perbaikan</text:p>
          </table:table-cell>
          <table:table-cell table:style-name="ce8" office:value-type="string" calcext:value-type="string">
            <text:p>Perbaiki pola makan dan aktivitas fisi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14T06:43:12" calcext:value-type="date">
            <text:p>6/14/2026 6:43:12</text:p>
          </table:table-cell>
          <table:table-cell table:style-name="ce8" office:value-type="string" calcext:value-type="string">
            <text:p>test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amin3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Sepeda</text:p>
          </table:table-cell>
          <table:table-cell table:style-name="ce16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2" office:value-type="time" office:time-value="PT20H11M00S" calcext:value-type="time">
            <text:p>20:11</text:p>
          </table:table-cell>
          <table:table-cell table:style-name="ce8" office:value-type="string" calcext:value-type="string">
            <text:p>Lunge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2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00M00S" calcext:value-type="time">
            <text:p>22:00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ri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Sedikit/Tidak Olahraga</text:p>
          </table:table-cell>
          <table:table-cell table:style-name="ce8" office:value-type="float" office:value="63" calcext:value-type="float">
            <text:p>63</text:p>
          </table:table-cell>
          <table:table-cell table:style-name="ce29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362" calcext:value-type="float">
            <text:p>1362</text:p>
          </table:table-cell>
          <table:table-cell table:style-name="ce8" office:value-type="float" office:value="1634" calcext:value-type="float">
            <text:p>163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rlu perbaikan</text:p>
          </table:table-cell>
          <table:table-cell table:style-name="ce8" office:value-type="string" calcext:value-type="string">
            <text:p>Perbaiki pola makan dan aktivitas fisi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5T06:43:12" calcext:value-type="date">
            <text:p>6/15/2026 6:43:12</text:p>
          </table:table-cell>
          <table:table-cell table:style-name="ce10" office:value-type="string" calcext:value-type="string">
            <text:p>test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4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epeda</text:p>
          </table:table-cell>
          <table:table-cell table:style-name="ce18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3" office:value-type="time" office:time-value="PT20H11M00S" calcext:value-type="time">
            <text:p>20:11</text:p>
          </table:table-cell>
          <table:table-cell table:style-name="ce10" office:value-type="string" calcext:value-type="string">
            <text:p>Lunge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00M00S" calcext:value-type="time">
            <text:p>22:00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16T06:43:12" calcext:value-type="date">
            <text:p>6/16/2026 6:43:12</text:p>
          </table:table-cell>
          <table:table-cell table:style-name="ce10" office:value-type="string" calcext:value-type="string">
            <text:p>test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amin5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epeda</text:p>
          </table:table-cell>
          <table:table-cell table:style-name="ce18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3" office:value-type="time" office:time-value="PT20H11M00S" calcext:value-type="time">
            <text:p>20:11</text:p>
          </table:table-cell>
          <table:table-cell table:style-name="ce10" office:value-type="string" calcext:value-type="string">
            <text:p>Lunge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00M00S" calcext:value-type="time">
            <text:p>22:00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6" office:value-type="date" office:date-value="2026-06-17T06:43:12" calcext:value-type="date">
            <text:p>6/17/2026 6:43:12</text:p>
          </table:table-cell>
          <table:table-cell table:style-name="ce11" office:value-type="string" calcext:value-type="string">
            <text:p>test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Jaga Stamina</text:p>
          </table:table-cell>
          <table:table-cell table:style-name="ce11" office:value-type="string" calcext:value-type="string">
            <text:p>amin6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Sepeda</text:p>
          </table:table-cell>
          <table:table-cell table:style-name="ce19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4" office:value-type="time" office:time-value="PT20H11M00S" calcext:value-type="time">
            <text:p>20:11</text:p>
          </table:table-cell>
          <table:table-cell table:style-name="ce11" office:value-type="string" calcext:value-type="string">
            <text:p>Lung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2 ltr</text:p>
          </table:table-cell>
          <table:table-cell table:style-name="ce11" office:value-type="string" calcext:value-type="string">
            <text:p>OK</text:p>
          </table:table-cell>
          <table:table-cell table:style-name="ce24" office:value-type="time" office:time-value="PT22H00M00S" calcext:value-type="time">
            <text:p>22:00</text:p>
          </table:table-cell>
          <table:table-cell table:style-name="ce11" office:value-type="string" calcext:value-type="string">
            <text:p>6 - 8 jam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Pria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edikit/Tidak Olahraga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362" calcext:value-type="float">
            <text:p>1362</text:p>
          </table:table-cell>
          <table:table-cell table:style-name="ce11" office:value-type="float" office:value="1634" calcext:value-type="float">
            <text:p>163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erlu perbaikan</text:p>
          </table:table-cell>
          <table:table-cell table:style-name="ce11" office:value-type="string" calcext:value-type="string">
            <text:p>Perbaiki pola makan dan aktivitas fisik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6" office:value-type="date" office:date-value="2026-06-18T06:43:12" calcext:value-type="date">
            <text:p>6/18/2026 6:43:12</text:p>
          </table:table-cell>
          <table:table-cell table:style-name="ce11" office:value-type="string" calcext:value-type="string">
            <text:p>test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Jaga Stamina</text:p>
          </table:table-cell>
          <table:table-cell table:style-name="ce11" office:value-type="string" calcext:value-type="string">
            <text:p>amin7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Sepeda</text:p>
          </table:table-cell>
          <table:table-cell table:style-name="ce19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4" office:value-type="time" office:time-value="PT20H11M00S" calcext:value-type="time">
            <text:p>20:11</text:p>
          </table:table-cell>
          <table:table-cell table:style-name="ce11" office:value-type="string" calcext:value-type="string">
            <text:p>Lung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2 ltr</text:p>
          </table:table-cell>
          <table:table-cell table:style-name="ce11" office:value-type="string" calcext:value-type="string">
            <text:p>OK</text:p>
          </table:table-cell>
          <table:table-cell table:style-name="ce24" office:value-type="time" office:time-value="PT22H00M00S" calcext:value-type="time">
            <text:p>22:00</text:p>
          </table:table-cell>
          <table:table-cell table:style-name="ce11" office:value-type="string" calcext:value-type="string">
            <text:p>6 - 8 jam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Pria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edikit/Tidak Olahraga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362" calcext:value-type="float">
            <text:p>1362</text:p>
          </table:table-cell>
          <table:table-cell table:style-name="ce11" office:value-type="float" office:value="1634" calcext:value-type="float">
            <text:p>163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erlu perbaikan</text:p>
          </table:table-cell>
          <table:table-cell table:style-name="ce11" office:value-type="string" calcext:value-type="string">
            <text:p>Perbaiki pola makan dan aktivitas fisik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19T06:43:12" calcext:value-type="date">
            <text:p>6/19/2026 6:43:12</text:p>
          </table:table-cell>
          <table:table-cell table:style-name="ce8" office:value-type="string" calcext:value-type="string">
            <text:p>test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hestiy8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Sepeda</text:p>
          </table:table-cell>
          <table:table-cell table:style-name="ce16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2" office:value-type="time" office:time-value="PT20H11M00S" calcext:value-type="time">
            <text:p>20:11</text:p>
          </table:table-cell>
          <table:table-cell table:style-name="ce8" office:value-type="string" calcext:value-type="string">
            <text:p>Lunge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2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00M00S" calcext:value-type="time">
            <text:p>22:00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ri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Sedikit/Tidak Olahraga</text:p>
          </table:table-cell>
          <table:table-cell table:style-name="ce8" office:value-type="float" office:value="63" calcext:value-type="float">
            <text:p>63</text:p>
          </table:table-cell>
          <table:table-cell table:style-name="ce29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362" calcext:value-type="float">
            <text:p>1362</text:p>
          </table:table-cell>
          <table:table-cell table:style-name="ce8" office:value-type="float" office:value="1634" calcext:value-type="float">
            <text:p>163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rlu perbaikan</text:p>
          </table:table-cell>
          <table:table-cell table:style-name="ce8" office:value-type="string" calcext:value-type="string">
            <text:p>Perbaiki pola makan dan aktivitas fisi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20T06:43:12" calcext:value-type="date">
            <text:p>6/20/2026 6:43:12</text:p>
          </table:table-cell>
          <table:table-cell table:style-name="ce8" office:value-type="string" calcext:value-type="string">
            <text:p>test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hestiy9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Sepeda</text:p>
          </table:table-cell>
          <table:table-cell table:style-name="ce16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2" office:value-type="time" office:time-value="PT20H11M00S" calcext:value-type="time">
            <text:p>20:11</text:p>
          </table:table-cell>
          <table:table-cell table:style-name="ce8" office:value-type="string" calcext:value-type="string">
            <text:p>Lunge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2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00M00S" calcext:value-type="time">
            <text:p>22:00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ri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Sedikit/Tidak Olahraga</text:p>
          </table:table-cell>
          <table:table-cell table:style-name="ce8" office:value-type="float" office:value="63" calcext:value-type="float">
            <text:p>63</text:p>
          </table:table-cell>
          <table:table-cell table:style-name="ce29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362" calcext:value-type="float">
            <text:p>1362</text:p>
          </table:table-cell>
          <table:table-cell table:style-name="ce8" office:value-type="float" office:value="1634" calcext:value-type="float">
            <text:p>163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rlu perbaikan</text:p>
          </table:table-cell>
          <table:table-cell table:style-name="ce8" office:value-type="string" calcext:value-type="string">
            <text:p>Perbaiki pola makan dan aktivitas fisi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6-21T06:43:12" calcext:value-type="date">
            <text:p>6/21/2026 6:43:12</text:p>
          </table:table-cell>
          <table:table-cell table:style-name="ce8" office:value-type="string" calcext:value-type="string">
            <text:p>test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hestiy10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Sepeda</text:p>
          </table:table-cell>
          <table:table-cell table:style-name="ce16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2" office:value-type="time" office:time-value="PT20H11M00S" calcext:value-type="time">
            <text:p>20:11</text:p>
          </table:table-cell>
          <table:table-cell table:style-name="ce8" office:value-type="string" calcext:value-type="string">
            <text:p>Lunge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2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00M00S" calcext:value-type="time">
            <text:p>22:00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ri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Sedikit/Tidak Olahraga</text:p>
          </table:table-cell>
          <table:table-cell table:style-name="ce8" office:value-type="float" office:value="63" calcext:value-type="float">
            <text:p>63</text:p>
          </table:table-cell>
          <table:table-cell table:style-name="ce29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362" calcext:value-type="float">
            <text:p>1362</text:p>
          </table:table-cell>
          <table:table-cell table:style-name="ce8" office:value-type="float" office:value="1634" calcext:value-type="float">
            <text:p>163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rlu perbaikan</text:p>
          </table:table-cell>
          <table:table-cell table:style-name="ce8" office:value-type="string" calcext:value-type="string">
            <text:p>Perbaiki pola makan dan aktivitas fisi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22T06:43:12" calcext:value-type="date">
            <text:p>6/22/2026 6:43:12</text:p>
          </table:table-cell>
          <table:table-cell table:style-name="ce10" office:value-type="string" calcext:value-type="string">
            <text:p>test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hestiy11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epeda</text:p>
          </table:table-cell>
          <table:table-cell table:style-name="ce18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3" office:value-type="time" office:time-value="PT20H11M00S" calcext:value-type="time">
            <text:p>20:11</text:p>
          </table:table-cell>
          <table:table-cell table:style-name="ce10" office:value-type="string" calcext:value-type="string">
            <text:p>Lunge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00M00S" calcext:value-type="time">
            <text:p>22:00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21T06:43:12" calcext:value-type="date">
            <text:p>6/21/2026 6:43:12</text:p>
          </table:table-cell>
          <table:table-cell table:style-name="ce10" office:value-type="string" calcext:value-type="string">
            <text:p>test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hestiy12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epeda</text:p>
          </table:table-cell>
          <table:table-cell table:style-name="ce18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3" office:value-type="time" office:time-value="PT20H11M00S" calcext:value-type="time">
            <text:p>20:11</text:p>
          </table:table-cell>
          <table:table-cell table:style-name="ce10" office:value-type="string" calcext:value-type="string">
            <text:p>Lunge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00M00S" calcext:value-type="time">
            <text:p>22:00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6" office:value-type="date" office:date-value="2026-06-24T06:43:12" calcext:value-type="date">
            <text:p>6/24/2026 6:43:12</text:p>
          </table:table-cell>
          <table:table-cell table:style-name="ce11" office:value-type="string" calcext:value-type="string">
            <text:p>test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Jaga Stamina</text:p>
          </table:table-cell>
          <table:table-cell table:style-name="ce11" office:value-type="string" calcext:value-type="string">
            <text:p>hestiy13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Sepeda</text:p>
          </table:table-cell>
          <table:table-cell table:style-name="ce19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4" office:value-type="time" office:time-value="PT20H11M00S" calcext:value-type="time">
            <text:p>20:11</text:p>
          </table:table-cell>
          <table:table-cell table:style-name="ce11" office:value-type="string" calcext:value-type="string">
            <text:p>Lung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2 ltr</text:p>
          </table:table-cell>
          <table:table-cell table:style-name="ce11" office:value-type="string" calcext:value-type="string">
            <text:p>OK</text:p>
          </table:table-cell>
          <table:table-cell table:style-name="ce24" office:value-type="time" office:time-value="PT22H00M00S" calcext:value-type="time">
            <text:p>22:00</text:p>
          </table:table-cell>
          <table:table-cell table:style-name="ce11" office:value-type="string" calcext:value-type="string">
            <text:p>6 - 8 jam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Pria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edikit/Tidak Olahraga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362" calcext:value-type="float">
            <text:p>1362</text:p>
          </table:table-cell>
          <table:table-cell table:style-name="ce11" office:value-type="float" office:value="1634" calcext:value-type="float">
            <text:p>163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erlu perbaikan</text:p>
          </table:table-cell>
          <table:table-cell table:style-name="ce11" office:value-type="string" calcext:value-type="string">
            <text:p>Perbaiki pola makan dan aktivitas fisik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6" office:value-type="date" office:date-value="2026-06-25T06:43:12" calcext:value-type="date">
            <text:p>6/25/2026 6:43:12</text:p>
          </table:table-cell>
          <table:table-cell table:style-name="ce11" office:value-type="string" calcext:value-type="string">
            <text:p>test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Jaga Stamina</text:p>
          </table:table-cell>
          <table:table-cell table:style-name="ce11" office:value-type="string" calcext:value-type="string">
            <text:p>hestiy14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Sepeda</text:p>
          </table:table-cell>
          <table:table-cell table:style-name="ce19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4" office:value-type="time" office:time-value="PT20H11M00S" calcext:value-type="time">
            <text:p>20:11</text:p>
          </table:table-cell>
          <table:table-cell table:style-name="ce11" office:value-type="string" calcext:value-type="string">
            <text:p>Lung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2 ltr</text:p>
          </table:table-cell>
          <table:table-cell table:style-name="ce11" office:value-type="string" calcext:value-type="string">
            <text:p>OK</text:p>
          </table:table-cell>
          <table:table-cell table:style-name="ce24" office:value-type="time" office:time-value="PT22H00M00S" calcext:value-type="time">
            <text:p>22:00</text:p>
          </table:table-cell>
          <table:table-cell table:style-name="ce11" office:value-type="string" calcext:value-type="string">
            <text:p>6 - 8 jam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Pria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edikit/Tidak Olahraga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362" calcext:value-type="float">
            <text:p>1362</text:p>
          </table:table-cell>
          <table:table-cell table:style-name="ce11" office:value-type="float" office:value="1634" calcext:value-type="float">
            <text:p>163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erlu perbaikan</text:p>
          </table:table-cell>
          <table:table-cell table:style-name="ce11" office:value-type="string" calcext:value-type="string">
            <text:p>Perbaiki pola makan dan aktivitas fisik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6" office:value-type="date" office:date-value="2026-06-21T06:43:12" calcext:value-type="date">
            <text:p>6/21/2026 6:43:12</text:p>
          </table:table-cell>
          <table:table-cell table:style-name="ce11" office:value-type="string" calcext:value-type="string">
            <text:p>test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Jaga Stamina</text:p>
          </table:table-cell>
          <table:table-cell table:style-name="ce11" office:value-type="string" calcext:value-type="string">
            <text:p>hestiy15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Sepeda</text:p>
          </table:table-cell>
          <table:table-cell table:style-name="ce19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4" office:value-type="time" office:time-value="PT20H11M00S" calcext:value-type="time">
            <text:p>20:11</text:p>
          </table:table-cell>
          <table:table-cell table:style-name="ce11" office:value-type="string" calcext:value-type="string">
            <text:p>Lung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2 ltr</text:p>
          </table:table-cell>
          <table:table-cell table:style-name="ce11" office:value-type="string" calcext:value-type="string">
            <text:p>OK</text:p>
          </table:table-cell>
          <table:table-cell table:style-name="ce24" office:value-type="time" office:time-value="PT22H00M00S" calcext:value-type="time">
            <text:p>22:00</text:p>
          </table:table-cell>
          <table:table-cell table:style-name="ce11" office:value-type="string" calcext:value-type="string">
            <text:p>6 - 8 jam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Pria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edikit/Tidak Olahraga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362" calcext:value-type="float">
            <text:p>1362</text:p>
          </table:table-cell>
          <table:table-cell table:style-name="ce11" office:value-type="float" office:value="1634" calcext:value-type="float">
            <text:p>163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erlu perbaikan</text:p>
          </table:table-cell>
          <table:table-cell table:style-name="ce11" office:value-type="string" calcext:value-type="string">
            <text:p>Perbaiki pola makan dan aktivitas fisik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6" office:value-type="date" office:date-value="2026-06-22T06:43:12" calcext:value-type="date">
            <text:p>6/22/2026 6:43:12</text:p>
          </table:table-cell>
          <table:table-cell table:style-name="ce11" office:value-type="string" calcext:value-type="string">
            <text:p>test1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Jaga Stamina</text:p>
          </table:table-cell>
          <table:table-cell table:style-name="ce11" office:value-type="string" calcext:value-type="string">
            <text:p>hestiy15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Sepeda</text:p>
          </table:table-cell>
          <table:table-cell table:style-name="ce19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4" office:value-type="time" office:time-value="PT20H11M00S" calcext:value-type="time">
            <text:p>20:11</text:p>
          </table:table-cell>
          <table:table-cell table:style-name="ce11" office:value-type="string" calcext:value-type="string">
            <text:p>Lung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2 ltr</text:p>
          </table:table-cell>
          <table:table-cell table:style-name="ce11" office:value-type="string" calcext:value-type="string">
            <text:p>OK</text:p>
          </table:table-cell>
          <table:table-cell table:style-name="ce24" office:value-type="time" office:time-value="PT22H00M00S" calcext:value-type="time">
            <text:p>22:00</text:p>
          </table:table-cell>
          <table:table-cell table:style-name="ce11" office:value-type="string" calcext:value-type="string">
            <text:p>6 - 8 jam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Pria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edikit/Tidak Olahraga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362" calcext:value-type="float">
            <text:p>1362</text:p>
          </table:table-cell>
          <table:table-cell table:style-name="ce11" office:value-type="float" office:value="1634" calcext:value-type="float">
            <text:p>163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erlu perbaikan</text:p>
          </table:table-cell>
          <table:table-cell table:style-name="ce11" office:value-type="string" calcext:value-type="string">
            <text:p>Perbaiki pola makan dan aktivitas fisik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6" office:value-type="date" office:date-value="2026-06-23T06:43:12" calcext:value-type="date">
            <text:p>6/23/2026 6:43:12</text:p>
          </table:table-cell>
          <table:table-cell table:style-name="ce11" office:value-type="string" calcext:value-type="string">
            <text:p>test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Jaga Stamina</text:p>
          </table:table-cell>
          <table:table-cell table:style-name="ce11" office:value-type="string" calcext:value-type="string">
            <text:p>hestiy15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Sepeda</text:p>
          </table:table-cell>
          <table:table-cell table:style-name="ce19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4" office:value-type="time" office:time-value="PT20H11M00S" calcext:value-type="time">
            <text:p>20:11</text:p>
          </table:table-cell>
          <table:table-cell table:style-name="ce11" office:value-type="string" calcext:value-type="string">
            <text:p>Lung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2 ltr</text:p>
          </table:table-cell>
          <table:table-cell table:style-name="ce11" office:value-type="string" calcext:value-type="string">
            <text:p>OK</text:p>
          </table:table-cell>
          <table:table-cell table:style-name="ce24" office:value-type="time" office:time-value="PT22H00M00S" calcext:value-type="time">
            <text:p>22:00</text:p>
          </table:table-cell>
          <table:table-cell table:style-name="ce11" office:value-type="string" calcext:value-type="string">
            <text:p>6 - 8 jam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Pria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edikit/Tidak Olahraga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362" calcext:value-type="float">
            <text:p>1362</text:p>
          </table:table-cell>
          <table:table-cell table:style-name="ce11" office:value-type="float" office:value="1634" calcext:value-type="float">
            <text:p>163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erlu perbaikan</text:p>
          </table:table-cell>
          <table:table-cell table:style-name="ce11" office:value-type="string" calcext:value-type="string">
            <text:p>Perbaiki pola makan dan aktivitas fisik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6" office:value-type="date" office:date-value="2026-06-24T06:43:12" calcext:value-type="date">
            <text:p>6/24/2026 6:43:12</text:p>
          </table:table-cell>
          <table:table-cell table:style-name="ce11" office:value-type="string" calcext:value-type="string">
            <text:p>test1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aga Stamina</text:p>
          </table:table-cell>
          <table:table-cell table:style-name="ce11" office:value-type="string" calcext:value-type="string">
            <text:p>hestiy15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Sepeda</text:p>
          </table:table-cell>
          <table:table-cell table:style-name="ce19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4" office:value-type="time" office:time-value="PT20H11M00S" calcext:value-type="time">
            <text:p>20:11</text:p>
          </table:table-cell>
          <table:table-cell table:style-name="ce11" office:value-type="string" calcext:value-type="string">
            <text:p>Lung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2 ltr</text:p>
          </table:table-cell>
          <table:table-cell table:style-name="ce11" office:value-type="string" calcext:value-type="string">
            <text:p>OK</text:p>
          </table:table-cell>
          <table:table-cell table:style-name="ce24" office:value-type="time" office:time-value="PT22H00M00S" calcext:value-type="time">
            <text:p>22:00</text:p>
          </table:table-cell>
          <table:table-cell table:style-name="ce11" office:value-type="string" calcext:value-type="string">
            <text:p>6 - 8 jam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Pria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edikit/Tidak Olahraga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362" calcext:value-type="float">
            <text:p>1362</text:p>
          </table:table-cell>
          <table:table-cell table:style-name="ce11" office:value-type="float" office:value="1634" calcext:value-type="float">
            <text:p>163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erlu perbaikan</text:p>
          </table:table-cell>
          <table:table-cell table:style-name="ce11" office:value-type="string" calcext:value-type="string">
            <text:p>Perbaiki pola makan dan aktivitas fisik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22T06:43:12" calcext:value-type="date">
            <text:p>6/22/2026 6:43:12</text:p>
          </table:table-cell>
          <table:table-cell table:style-name="ce10" office:value-type="string" calcext:value-type="string">
            <text:p>test1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hestiy12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epeda</text:p>
          </table:table-cell>
          <table:table-cell table:style-name="ce18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3" office:value-type="time" office:time-value="PT20H11M00S" calcext:value-type="time">
            <text:p>20:11</text:p>
          </table:table-cell>
          <table:table-cell table:style-name="ce10" office:value-type="string" calcext:value-type="string">
            <text:p>Lunge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00M00S" calcext:value-type="time">
            <text:p>22:00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5" office:value-type="date" office:date-value="2026-06-23T06:43:12" calcext:value-type="date">
            <text:p>6/23/2026 6:43:12</text:p>
          </table:table-cell>
          <table:table-cell table:style-name="ce10" office:value-type="string" calcext:value-type="string">
            <text:p>test1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urun Berat Badan</text:p>
          </table:table-cell>
          <table:table-cell table:style-name="ce10" office:value-type="string" calcext:value-type="string">
            <text:p>hestiy12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mZQGpSpOJUCzduWkEF8VwiDp91YiVrFI/view?usp=drivesdk" xlink:type="simple">https://drive.google.com/file/d/1mZQGpSpOJUCzduWkEF8VwiDp91YiVrF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gHZPCM_dxmFw331EbostpYDc2WK4s-Ji/view?usp=drivesdk" xlink:type="simple">https://drive.google.com/file/d/1gHZPCM_dxmFw331EbostpYDc2WK4s-Ji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SLH5iYU_6FCGKo5S9MiFx3ZFEq1D-vhn/view?usp=drivesdk" xlink:type="simple">https://drive.google.com/file/d/1SLH5iYU_6FCGKo5S9MiFx3ZFEq1D-vhn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FNVrnKPCVAvC4_8hgjtVCHIeLTB4P2YU/view?usp=drivesdk" xlink:type="simple">https://drive.google.com/file/d/1FNVrnKPCVAvC4_8hgjtVCHIeLTB4P2YU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8" office:value-type="string" calcext:value-type="string">
            <text:p><text:a xlink:href="https://drive.google.com/file/d/1IM0GSxJT40Ear6DpG_mABrS_Q4uylyGp/view?usp=drivesdk" xlink:type="simple">https://drive.google.com/file/d/1IM0GSxJT40Ear6DpG_mABrS_Q4uylyGp/view?usp=drivesdk</text:a>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epeda</text:p>
          </table:table-cell>
          <table:table-cell table:style-name="ce18" office:value-type="string" calcext:value-type="string">
            <text:p><text:a xlink:href="https://drive.google.com/file/d/1hUZ4KSsHwY3Eek5jgfG48ADMF8n8kSbp/view?usp=drivesdk" xlink:type="simple">https://drive.google.com/file/d/1hUZ4KSsHwY3Eek5jgfG48ADMF8n8kSbp/view?usp=drivesdk</text:a></text:p>
          </table:table-cell>
          <table:table-cell table:number-columns-repeated="2" table:style-name="ce23" office:value-type="time" office:time-value="PT20H11M00S" calcext:value-type="time">
            <text:p>20:11</text:p>
          </table:table-cell>
          <table:table-cell table:style-name="ce10" office:value-type="string" calcext:value-type="string">
            <text:p>Lunge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ltr</text:p>
          </table:table-cell>
          <table:table-cell table:style-name="ce10" office:value-type="string" calcext:value-type="string">
            <text:p>OK</text:p>
          </table:table-cell>
          <table:table-cell table:style-name="ce23" office:value-type="time" office:time-value="PT22H00M00S" calcext:value-type="time">
            <text:p>22:00</text:p>
          </table:table-cell>
          <table:table-cell table:style-name="ce10" office:value-type="string" calcext:value-type="string">
            <text:p>6 - 8 jam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Pri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edikit/Tidak Olahraga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rlu perbaikan</text:p>
          </table:table-cell>
          <table:table-cell table:style-name="ce10" office:value-type="string" calcext:value-type="string">
            <text:p>Perbaiki pola makan dan aktivitas fisi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7-15T14:17:09.359" calcext:value-type="date">
            <text:p>7/15/2026 14:17:09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 amin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ULH6nhnFpknDYhEL71vDjReXuffuPPYR/view?usp=drivesdk" xlink:type="simple">https://drive.google.com/file/d/1ULH6nhnFpknDYhEL71vDjReXuffuPPYR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Pp1qpv7O3oXC7OQiJEBBHqXnnzW3FKeC/view?usp=drivesdk" xlink:type="simple">https://drive.google.com/file/d/1Pp1qpv7O3oXC7OQiJEBBHqXnnzW3FKeC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RRLc9mAnYUg5peDfIkOG7l4MLIqpWrvQ/view?usp=drivesdk" xlink:type="simple">https://drive.google.com/file/d/1RRLc9mAnYUg5peDfIkOG7l4MLIqpWrvQ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Qr__14ybWOKAoSc2fWF3UjVW7EszHA8c/view?usp=drivesdk" xlink:type="simple">https://drive.google.com/file/d/1Qr__14ybWOKAoSc2fWF3UjVW7EszHA8c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mcj_Kxy0c9ucvKdy8ox3VUAtbhjRcaaE/view?usp=drivesdk" xlink:type="simple">https://drive.google.com/file/d/1mcj_Kxy0c9ucvKdy8ox3VUAtbhjRcaaE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Lari</text:p>
          </table:table-cell>
          <table:table-cell table:style-name="ce16" office:value-type="string" calcext:value-type="string">
            <text:p><text:a xlink:href="https://drive.google.com/file/d/1IpEIk1cFAos8ILNLvx2Q9tVS9C3mAYDn/view?usp=drivesdk" xlink:type="simple">https://drive.google.com/file/d/1IpEIk1cFAos8ILNLvx2Q9tVS9C3mAYDn/view?usp=drivesdk</text:a></text:p>
          </table:table-cell>
          <table:table-cell table:style-name="ce22" office:value-type="time" office:time-value="PT14H05M00S" calcext:value-type="time">
            <text:p>14:05</text:p>
          </table:table-cell>
          <table:table-cell table:style-name="ce22" office:value-type="time" office:time-value="PT13H05M00S" calcext:value-type="time">
            <text:p>13:05</text:p>
          </table:table-cell>
          <table:table-cell table:style-name="ce8" office:value-type="string" calcext:value-type="string">
            <text:p>Push Up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1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12M00S" calcext:value-type="time">
            <text:p>22:12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7"/>
          <table:table-cell table:style-name="ce29"/>
          <table:table-cell table:style-name="ce8" table:number-columns-repeated="10"/>
          <table:table-cell table:number-columns-repeated="2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7-15T14:21:46.832" calcext:value-type="date">
            <text:p>7/15/2026 14:21:47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 amin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1NJeJycoOAiJYo0FvXMNZtPfznpuptS6/view?usp=drivesdk" xlink:type="simple">https://drive.google.com/file/d/11NJeJycoOAiJYo0FvXMNZtPfznpuptS6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SRfKTv0kklETegJ-RNK33PS2nOXZsvPL/view?usp=drivesdk" xlink:type="simple">https://drive.google.com/file/d/1SRfKTv0kklETegJ-RNK33PS2nOXZsvPL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wJuPrjCmNh8Z2xqxy7DN_5xnsA2n7u7l/view?usp=drivesdk" xlink:type="simple">https://drive.google.com/file/d/1wJuPrjCmNh8Z2xqxy7DN_5xnsA2n7u7l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wmlpyq1DkkKbmPHLBqy4qxFF-N8E1axR/view?usp=drivesdk" xlink:type="simple">https://drive.google.com/file/d/1wmlpyq1DkkKbmPHLBqy4qxFF-N8E1axR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gFMzUEzQmCDc8kaTiZY-PcdUH9pdISB0/view?usp=drivesdk" xlink:type="simple">https://drive.google.com/file/d/1gFMzUEzQmCDc8kaTiZY-PcdUH9pdISB0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Sepeda</text:p>
          </table:table-cell>
          <table:table-cell table:style-name="ce16" office:value-type="string" calcext:value-type="string">
            <text:p><text:a xlink:href="https://drive.google.com/file/d/1WkGbCA_MHiJAa7A5LrAFMdCP9d1K6RHR/view?usp=drivesdk" xlink:type="simple">https://drive.google.com/file/d/1WkGbCA_MHiJAa7A5LrAFMdCP9d1K6RHR/view?usp=drivesdk</text:a></text:p>
          </table:table-cell>
          <table:table-cell table:style-name="ce22" office:value-type="time" office:time-value="PT14H17M00S" calcext:value-type="time">
            <text:p>14:17</text:p>
          </table:table-cell>
          <table:table-cell table:style-name="ce22" office:value-type="time" office:time-value="PT15H17M00S" calcext:value-type="time">
            <text:p>15:17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urang dari 1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18M00S" calcext:value-type="time">
            <text:p>22:18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7"/>
          <table:table-cell table:style-name="ce29"/>
          <table:table-cell table:style-name="ce8" table:number-columns-repeated="10"/>
          <table:table-cell table:number-columns-repeated="2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>
          <table:table-cell table:style-name="ce3" office:value-type="date" office:date-value="2026-07-15T14:26:26.365" calcext:value-type="date">
            <text:p>7/15/2026 14:26:26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 amin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tZ0jaQz5-w9-gYOxnVZ2pDSP-iqctdwD/view?usp=drivesdk" xlink:type="simple">https://drive.google.com/file/d/1tZ0jaQz5-w9-gYOxnVZ2pDSP-iqctdwD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zbPP996lnYSXZ3GegMgwRpV2rhgETJnp/view?usp=drivesdk" xlink:type="simple">https://drive.google.com/file/d/1zbPP996lnYSXZ3GegMgwRpV2rhgETJnp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CXTIdYTNTBLfAtmR05jbqwAUQBizuSqH/view?usp=drivesdk" xlink:type="simple">https://drive.google.com/file/d/1CXTIdYTNTBLfAtmR05jbqwAUQBizuSqH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G4vtkGRNlXUYCKNsaBm5Xw1wZxz0YYXU/view?usp=drivesdk" xlink:type="simple">https://drive.google.com/file/d/1G4vtkGRNlXUYCKNsaBm5Xw1wZxz0YYXU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3Xh0i0Kfby0pXZ9ov5tjAjmf_can-4vG/view?usp=drivesdk" xlink:type="simple">https://drive.google.com/file/d/13Xh0i0Kfby0pXZ9ov5tjAjmf_can-4vG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Renang</text:p>
          </table:table-cell>
          <table:table-cell table:style-name="ce16" office:value-type="string" calcext:value-type="string">
            <text:p><text:a xlink:href="https://drive.google.com/file/d/11q8x-LDX2m8cyPyc_7nkhCgKcxLKEcWY/view?usp=drivesdk" xlink:type="simple">https://drive.google.com/file/d/11q8x-LDX2m8cyPyc_7nkhCgKcxLKEcWY/view?usp=drivesdk</text:a></text:p>
          </table:table-cell>
          <table:table-cell table:style-name="ce22" office:value-type="time" office:time-value="PT14H21M00S" calcext:value-type="time">
            <text:p>14:21</text:p>
          </table:table-cell>
          <table:table-cell table:style-name="ce22" office:value-type="time" office:time-value="PT15H21M00S" calcext:value-type="time">
            <text:p>15:21</text:p>
          </table:table-cell>
          <table:table-cell table:style-name="ce8" office:value-type="string" calcext:value-type="string">
            <text:p>Push Up, Sit Up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2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2H22M00S" calcext:value-type="time">
            <text:p>22:22</text:p>
          </table:table-cell>
          <table:table-cell table:style-name="ce8" office:value-type="string" calcext:value-type="string">
            <text:p>Lebih dari 8 jam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7"/>
          <table:table-cell table:style-name="ce29"/>
          <table:table-cell table:style-name="ce8" table:number-columns-repeated="10"/>
          <table:table-cell table:number-columns-repeated="2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3"/>
          <table:table-cell table:number-columns-repeated="968"/>
        </table:table-row>
        <table:table-row table:style-name="ro2">
          <table:table-cell table:style-name="ce3" office:value-type="date" office:date-value="2026-07-15T14:34:41.847" calcext:value-type="date">
            <text:p>7/15/2026 14:34:42</text:p>
          </table:table-cell>
          <table:table-cell table:style-name="ce8" office:value-type="string" calcext:value-type="string">
            <text:p>assidik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Naik Berat Badan</text:p>
          </table:table-cell>
          <table:table-cell table:style-name="ce8" office:value-type="string" calcext:value-type="string">
            <text:p>muh assiddiqie amin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GDaGcqm4GG6qp75WSs13A7wW1AdZVm04/view?usp=drivesdk" xlink:type="simple">https://drive.google.com/file/d/1GDaGcqm4GG6qp75WSs13A7wW1AdZVm04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BgUg6sOtBDsvT_OO1GMTCJHSvqyEHgbA/view?usp=drivesdk" xlink:type="simple">https://drive.google.com/file/d/1BgUg6sOtBDsvT_OO1GMTCJHSvqyEHgbA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ixvmhkxla3LVdtgylZpqst7VIjesyLsJ/view?usp=drivesdk" xlink:type="simple">https://drive.google.com/file/d/1ixvmhkxla3LVdtgylZpqst7VIjesyLsJ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BSsZFRmFqQiAr0mtXELEE5oiWixRw3z5/view?usp=drivesdk" xlink:type="simple">https://drive.google.com/file/d/1BSsZFRmFqQiAr0mtXELEE5oiWixRw3z5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16" office:value-type="string" calcext:value-type="string">
            <text:p><text:a xlink:href="https://drive.google.com/file/d/1K83pgwbacAb9WsmnDzDhnfbLbuDfOZu9/view?usp=drivesdk" xlink:type="simple">https://drive.google.com/file/d/1K83pgwbacAb9WsmnDzDhnfbLbuDfOZu9/view?usp=drivesdk</text:a>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Renang</text:p>
          </table:table-cell>
          <table:table-cell table:style-name="ce16" office:value-type="string" calcext:value-type="string">
            <text:p><text:a xlink:href="https://drive.google.com/file/d/1XTPOaLJEjri5mln08vC_UbtMC3Vxjuil/view?usp=drivesdk" xlink:type="simple">https://drive.google.com/file/d/1XTPOaLJEjri5mln08vC_UbtMC3Vxjuil/view?usp=drivesdk</text:a></text:p>
          </table:table-cell>
          <table:table-cell table:style-name="ce22" office:value-type="time" office:time-value="PT14H27M00S" calcext:value-type="time">
            <text:p>14:27</text:p>
          </table:table-cell>
          <table:table-cell table:style-name="ce22" office:value-type="time" office:time-value="PT15H27M00S" calcext:value-type="time">
            <text:p>15:27</text:p>
          </table:table-cell>
          <table:table-cell table:style-name="ce8" office:value-type="string" calcext:value-type="string">
            <text:p>Push Up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1 ltr</text:p>
          </table:table-cell>
          <table:table-cell table:style-name="ce8" office:value-type="string" calcext:value-type="string">
            <text:p>OK</text:p>
          </table:table-cell>
          <table:table-cell table:style-name="ce22" office:value-type="time" office:time-value="PT21H27M00S" calcext:value-type="time">
            <text:p>21:27</text:p>
          </table:table-cell>
          <table:table-cell table:style-name="ce8" office:value-type="string" calcext:value-type="string">
            <text:p>6 - 8 ja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ria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Olahraga ringan 1-3 hari/minggu</text:p>
          </table:table-cell>
          <table:table-cell table:style-name="ce8" office:value-type="float" office:value="63" calcext:value-type="float">
            <text:p>63</text:p>
          </table:table-cell>
          <table:table-cell table:style-name="ce29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414" calcext:value-type="float">
            <text:p>1414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erlu perbaikan</text:p>
          </table:table-cell>
          <table:table-cell table:style-name="ce8" office:value-type="string" calcext:value-type="string">
            <text:p>Perbaiki pola makan dan aktivitas fisi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968"/>
        </table:table-row>
        <table:table-row table:style-name="ro2" table:visibility="collapse" table:number-rows-repeated="930">
          <table:table-cell table:style-name="ce7" table:number-columns-repeated="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style-name="ce7" table:number-columns-repeated="19"/>
          <table:table-cell table:style-name="ce28"/>
          <table:table-cell table:style-name="ce7" table:number-columns-repeated="13"/>
          <table:table-cell table:style-name="ce9" table:number-columns-repeated="4"/>
          <table:table-cell table:number-columns-repeated="968"/>
        </table:table-row>
        <table:table-row table:style-name="ro3" table:number-rows-repeated="104758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PROGRAM.$A$1" table:cell-range-address="$PROGRAM.$B$1:.$B$989"/>
        </table:named-expressions>
      </table:table>
      <table:table table:name="DATAKONSUMEN" table:style-name="ta2">
        <table:table-column table:style-name="co23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2" table:number-columns-repeated="2" table:default-cell-style-name="Default"/>
        <table:table-column table:style-name="co36" table:default-cell-style-name="Default"/>
        <table:table-column table:style-name="co22" table:number-columns-repeated="1001" table:default-cell-style-name="Default"/>
        <table:table-row table:style-name="ro2">
          <table:table-cell table:style-name="ce40" office:value-type="string" calcext:value-type="string">
            <text:p>Tanggal</text:p>
          </table:table-cell>
          <table:table-cell table:style-name="ce42" office:value-type="string" calcext:value-type="string">
            <text:p>No Pesanan</text:p>
          </table:table-cell>
          <table:table-cell table:style-name="ce42" office:value-type="string" calcext:value-type="string">
            <text:p>Program</text:p>
          </table:table-cell>
          <table:table-cell table:style-name="ce42" office:value-type="string" calcext:value-type="string">
            <text:p>Harga</text:p>
          </table:table-cell>
          <table:table-cell table:style-name="ce42" office:value-type="string" calcext:value-type="string">
            <text:p>Nama</text:p>
          </table:table-cell>
          <table:table-cell table:style-name="ce42" office:value-type="string" calcext:value-type="string">
            <text:p>Alamat</text:p>
          </table:table-cell>
          <table:table-cell table:style-name="ce42" office:value-type="string" calcext:value-type="string">
            <text:p>Telp</text:p>
          </table:table-cell>
          <table:table-cell table:style-name="ce42" office:value-type="string" calcext:value-type="string">
            <text:p>email</text:p>
          </table:table-cell>
          <table:table-cell table:style-name="ce42" office:value-type="string" calcext:value-type="string">
            <text:p>Kelurahan</text:p>
          </table:table-cell>
          <table:table-cell table:style-name="ce42" office:value-type="string" calcext:value-type="string">
            <text:p>Kecamatan</text:p>
          </table:table-cell>
          <table:table-cell table:style-name="ce42" office:value-type="string" calcext:value-type="string">
            <text:p>Kota</text:p>
          </table:table-cell>
          <table:table-cell table:style-name="ce42" office:value-type="string" calcext:value-type="string">
            <text:p>Propensi</text:p>
          </table:table-cell>
          <table:table-cell table:style-name="ce47" office:value-type="string" calcext:value-type="string">
            <text:p>User ID</text:p>
          </table:table-cell>
          <table:table-cell table:style-name="ce47" office:value-type="string" calcext:value-type="string">
            <text:p>Jeni Kelamin</text:p>
          </table:table-cell>
          <table:table-cell table:style-name="ce47" office:value-type="string" calcext:value-type="string">
            <text:p>Tgl Lahir</text:p>
          </table:table-cell>
          <table:table-cell table:style-name="ce47" office:value-type="string" calcext:value-type="string">
            <text:p>Testimoni</text:p>
          </table:table-cell>
          <table:table-cell table:style-name="ce47" office:value-type="string" calcext:value-type="string">
            <text:p>Feedback</text:p>
          </table:table-cell>
          <table:table-cell table:style-name="ce47" office:value-type="string" calcext:value-type="string">
            <text:p>Download Sertifikat</text:p>
          </table:table-cell>
          <table:table-cell table:style-name="ce47" office:value-type="string" calcext:value-type="string">
            <text:p>Produk</text:p>
          </table:table-cell>
          <table:table-cell table:style-name="ce51" office:value-type="string" calcext:value-type="string">
            <text:p>Nama Sponsor</text:p>
          </table:table-cell>
          <table:table-cell table:style-name="ce51" office:value-type="string" calcext:value-type="string">
            <text:p>HP Sponsor</text:p>
          </table:table-cell>
          <table:table-cell table:style-name="ce51" office:value-type="string" calcext:value-type="string">
            <text:p>Level Sponsor</text:p>
          </table:table-cell>
          <table:table-cell table:style-name="ce51" office:value-type="string" calcext:value-type="string">
            <text:p>Email Sponsor</text:p>
          </table:table-cell>
          <table:table-cell table:style-name="ce52" office:value-type="string" calcext:value-type="string">
            <text:p>Nama Coach</text:p>
          </table:table-cell>
          <table:table-cell table:style-name="ce52" office:value-type="string" calcext:value-type="string">
            <text:p>WA Coach</text:p>
          </table:table-cell>
          <table:table-cell table:style-name="ce7" table:number-columns-repeated="12"/>
          <table:table-cell table:number-columns-repeated="987"/>
        </table:table-row>
        <table:table-row table:style-name="ro2">
          <table:table-cell table:style-name="ce41" office:value-type="date" office:date-value="2025-11-16T16:26:27" calcext:value-type="date">
            <text:p>11/16/2025 16:26:27</text:p>
          </table:table-cell>
          <table:table-cell table:style-name="ce43" office:value-type="string" calcext:value-type="string">
            <text:p>PS161025-729</text:p>
          </table:table-cell>
          <table:table-cell table:style-name="ce43" office:value-type="string" calcext:value-type="string">
            <text:p>Turun Berat Badan</text:p>
          </table:table-cell>
          <table:table-cell table:style-name="ce43" office:value-type="float" office:value="700000" calcext:value-type="float">
            <text:p>700000</text:p>
          </table:table-cell>
          <table:table-cell table:style-name="ce44" office:value-type="string" calcext:value-type="string">
            <text:p>amin1</text:p>
          </table:table-cell>
          <table:table-cell table:style-name="ce43" office:value-type="string" calcext:value-type="string">
            <text:p>Jl dg tata kompleks hartaco indah</text:p>
          </table:table-cell>
          <table:table-cell table:style-name="ce43" office:value-type="float" office:value="8114499640" calcext:value-type="float">
            <text:p>8114499640</text:p>
          </table:table-cell>
          <table:table-cell table:style-name="ce43" office:value-type="string" calcext:value-type="string">
            <text:p>amihaji@gmail.com</text:p>
          </table:table-cell>
          <table:table-cell table:style-name="ce43" office:value-type="string" calcext:value-type="string">
            <text:p>ujungjalan</text:p>
          </table:table-cell>
          <table:table-cell table:style-name="ce43" office:value-type="string" calcext:value-type="string">
            <text:p>pandang</text:p>
          </table:table-cell>
          <table:table-cell table:style-name="ce43" office:value-type="string" calcext:value-type="string">
            <text:p>makassar</text:p>
          </table:table-cell>
          <table:table-cell table:style-name="ce43" office:value-type="string" calcext:value-type="string">
            <text:p>sulsel</text:p>
          </table:table-cell>
          <table:table-cell table:style-name="ce44" office:value-type="string" calcext:value-type="string">
            <text:p>aminhaji</text:p>
          </table:table-cell>
          <table:table-cell table:style-name="ce43" office:value-type="string" calcext:value-type="string">
            <text:p>pria</text:p>
          </table:table-cell>
          <table:table-cell table:style-name="ce48" office:value-type="date" office:date-value="1972-05-20T23:00:00" calcext:value-type="date">
            <text:p>20/05/1972 23:00:00</text:p>
          </table:table-cell>
          <table:table-cell table:style-name="ce43" office:value-type="string" calcext:value-type="string">
            <text:p>Programnya sangat membantu</text:p>
          </table:table-cell>
          <table:table-cell table:style-name="ce43" office:value-type="string" calcext:value-type="string">
            <text:p>perlu perbaikan aplikasinya</text:p>
          </table:table-cell>
          <table:table-cell table:style-name="ce43" office:value-type="string" calcext:value-type="string">
            <text:p>link : donwnload sertifikat</text:p>
          </table:table-cell>
          <table:table-cell table:style-name="ce43" office:value-type="string" calcext:value-type="string">
            <text:p>Start Now Pack</text:p>
          </table:table-cell>
          <table:table-cell table:style-name="ce43" office:value-type="string" calcext:value-type="string">
            <text:p>amin abdulhaji</text:p>
          </table:table-cell>
          <table:table-cell table:style-name="ce43" office:value-type="float" office:value="8123456789" calcext:value-type="float">
            <text:p>8123456789</text:p>
          </table:table-cell>
          <table:table-cell table:style-name="ce43" office:value-type="string" calcext:value-type="string">
            <text:p>mealtim</text:p>
          </table:table-cell>
          <table:table-cell table:style-name="ce43" office:value-type="string" calcext:value-type="string">
            <text:p>amihaji@gmail.com</text:p>
          </table:table-cell>
          <table:table-cell table:style-name="ce43" office:value-type="string" calcext:value-type="string">
            <text:p>amin abdulhaji</text:p>
          </table:table-cell>
          <table:table-cell table:style-name="ce44" office:value-type="float" office:value="8114499640" calcext:value-type="float">
            <text:p>8114499640</text:p>
          </table:table-cell>
          <table:table-cell table:style-name="ce44" table:number-columns-repeated="12"/>
          <table:table-cell table:number-columns-repeated="987"/>
        </table:table-row>
        <table:table-row table:style-name="ro2">
          <table:table-cell table:style-name="ce41" office:value-type="date" office:date-value="2025-11-16T16:35:01" calcext:value-type="date">
            <text:p>11/16/2025 16:35:01</text:p>
          </table:table-cell>
          <table:table-cell table:style-name="ce43" office:value-type="string" calcext:value-type="string">
            <text:p>PS161025-230</text:p>
          </table:table-cell>
          <table:table-cell table:style-name="ce43" office:value-type="string" calcext:value-type="string">
            <text:p>Naik Berat Badan</text:p>
          </table:table-cell>
          <table:table-cell table:style-name="ce43" office:value-type="float" office:value="700000" calcext:value-type="float">
            <text:p>700000</text:p>
          </table:table-cell>
          <table:table-cell table:style-name="ce44" office:value-type="string" calcext:value-type="string">
            <text:p>Hesty Husain Rauf</text:p>
          </table:table-cell>
          <table:table-cell table:style-name="ce43" office:value-type="string" calcext:value-type="string">
            <text:p>Indah Blok no 2</text:p>
          </table:table-cell>
          <table:table-cell table:style-name="ce43" office:value-type="float" office:value="8114499640" calcext:value-type="float">
            <text:p>8114499640</text:p>
          </table:table-cell>
          <table:table-cell table:style-name="ce43" office:value-type="string" calcext:value-type="string">
            <text:p>amihaji@gmail.com</text:p>
          </table:table-cell>
          <table:table-cell table:style-name="ce43" office:value-type="string" calcext:value-type="string">
            <text:p>ujung</text:p>
          </table:table-cell>
          <table:table-cell table:style-name="ce43" office:value-type="string" calcext:value-type="string">
            <text:p>pandang</text:p>
          </table:table-cell>
          <table:table-cell table:style-name="ce43" office:value-type="string" calcext:value-type="string">
            <text:p>makassar</text:p>
          </table:table-cell>
          <table:table-cell table:style-name="ce43" office:value-type="string" calcext:value-type="string">
            <text:p>sulsel</text:p>
          </table:table-cell>
          <table:table-cell table:style-name="ce46" office:value-type="string" calcext:value-type="string">
            <text:p>hestyhus</text:p>
          </table:table-cell>
          <table:table-cell table:style-name="ce43" office:value-type="string" calcext:value-type="string">
            <text:p>wanita</text:p>
          </table:table-cell>
          <table:table-cell table:style-name="ce49" office:value-type="date" office:date-value="1979-01-20" calcext:value-type="date">
            <text:p>20-January-1979</text:p>
          </table:table-cell>
          <table:table-cell table:style-name="ce43" office:value-type="string" calcext:value-type="string">
            <text:p>Programnya sangat membantu</text:p>
          </table:table-cell>
          <table:table-cell table:style-name="ce43" office:value-type="string" calcext:value-type="string">
            <text:p>aplikasi lambat</text:p>
          </table:table-cell>
          <table:table-cell table:style-name="ce43" office:value-type="string" calcext:value-type="string">
            <text:p>link : donwnload sertifikat</text:p>
          </table:table-cell>
          <table:table-cell table:style-name="ce43" office:value-type="string" calcext:value-type="string">
            <text:p>Shake Vanila</text:p>
          </table:table-cell>
          <table:table-cell table:style-name="ce43" office:value-type="string" calcext:value-type="string">
            <text:p>hesty husain</text:p>
          </table:table-cell>
          <table:table-cell table:style-name="ce43" office:value-type="float" office:value="81241318600" calcext:value-type="float">
            <text:p>81241318600</text:p>
          </table:table-cell>
          <table:table-cell table:style-name="ce43" office:value-type="string" calcext:value-type="string">
            <text:p>mealtim</text:p>
          </table:table-cell>
          <table:table-cell table:style-name="ce43" office:value-type="string" calcext:value-type="string">
            <text:p>amihaji@gmail.com</text:p>
          </table:table-cell>
          <table:table-cell table:style-name="ce43" office:value-type="string" calcext:value-type="string">
            <text:p>hesty husain</text:p>
          </table:table-cell>
          <table:table-cell table:style-name="ce44" office:value-type="float" office:value="81241318600" calcext:value-type="float">
            <text:p>81241318600</text:p>
          </table:table-cell>
          <table:table-cell table:style-name="ce44" table:number-columns-repeated="9"/>
          <table:table-cell table:style-name="ce7" table:number-columns-repeated="3"/>
          <table:table-cell table:number-columns-repeated="987"/>
        </table:table-row>
        <table:table-row table:style-name="ro2">
          <table:table-cell table:style-name="ce41" office:value-type="date" office:date-value="2025-11-23T10:22:34" calcext:value-type="date">
            <text:p>11/23/2025 10:22:34</text:p>
          </table:table-cell>
          <table:table-cell table:style-name="ce43" office:value-type="string" calcext:value-type="string">
            <text:p>PS231025-563</text:p>
          </table:table-cell>
          <table:table-cell table:style-name="ce43" office:value-type="string" calcext:value-type="string">
            <text:p>Turun Berat Badan</text:p>
          </table:table-cell>
          <table:table-cell table:style-name="ce43" office:value-type="float" office:value="700000" calcext:value-type="float">
            <text:p>700000</text:p>
          </table:table-cell>
          <table:table-cell table:style-name="ce44" office:value-type="string" calcext:value-type="string">
            <text:p>Alghazali</text:p>
          </table:table-cell>
          <table:table-cell table:style-name="ce43" office:value-type="string" calcext:value-type="string">
            <text:p>Dg Tata No 3</text:p>
          </table:table-cell>
          <table:table-cell table:style-name="ce45" office:value-type="float" office:value="85343974043" calcext:value-type="float">
            <text:p>85343974043</text:p>
          </table:table-cell>
          <table:table-cell table:style-name="ce43" office:value-type="string" calcext:value-type="string">
            <text:p>amihaji@gmail.com</text:p>
          </table:table-cell>
          <table:table-cell table:style-name="ce43" office:value-type="string" calcext:value-type="string">
            <text:p>ujung</text:p>
          </table:table-cell>
          <table:table-cell table:style-name="ce43" office:value-type="string" calcext:value-type="string">
            <text:p>pandang</text:p>
          </table:table-cell>
          <table:table-cell table:style-name="ce43" office:value-type="string" calcext:value-type="string">
            <text:p>makassar</text:p>
          </table:table-cell>
          <table:table-cell table:style-name="ce43" office:value-type="string" calcext:value-type="string">
            <text:p>sulsel</text:p>
          </table:table-cell>
          <table:table-cell table:style-name="ce46" office:value-type="string" calcext:value-type="string">
            <text:p>alghazal</text:p>
          </table:table-cell>
          <table:table-cell table:style-name="ce43" office:value-type="string" calcext:value-type="string">
            <text:p>pria</text:p>
          </table:table-cell>
          <table:table-cell table:style-name="ce50" office:value-type="date" office:date-value="2011-12-12" calcext:value-type="date">
            <text:p>12 December 2011</text:p>
          </table:table-cell>
          <table:table-cell table:style-name="ce43" office:value-type="string" calcext:value-type="string">
            <text:p>memberikan hasil yang memuaskan</text:p>
          </table:table-cell>
          <table:table-cell table:style-name="ce43" office:value-type="string" calcext:value-type="string">
            <text:p>aplikasi perlu perbaikan</text:p>
          </table:table-cell>
          <table:table-cell table:style-name="ce43" office:value-type="string" calcext:value-type="string">
            <text:p>link : donwnload sertifikat</text:p>
          </table:table-cell>
          <table:table-cell table:style-name="ce43" office:value-type="string" calcext:value-type="string">
            <text:p>Shake Coklat, Protein Powder</text:p>
          </table:table-cell>
          <table:table-cell table:style-name="ce43" office:value-type="string" calcext:value-type="string">
            <text:p>amin abdulhaji</text:p>
          </table:table-cell>
          <table:table-cell table:style-name="ce43" office:value-type="float" office:value="8114499640" calcext:value-type="float">
            <text:p>8114499640</text:p>
          </table:table-cell>
          <table:table-cell table:style-name="ce43" office:value-type="string" calcext:value-type="string">
            <text:p>mealtim</text:p>
          </table:table-cell>
          <table:table-cell table:style-name="ce43" office:value-type="string" calcext:value-type="string">
            <text:p>amihaji@gmail.com</text:p>
          </table:table-cell>
          <table:table-cell table:style-name="ce43" office:value-type="string" calcext:value-type="string">
            <text:p>amin abdulhaji</text:p>
          </table:table-cell>
          <table:table-cell table:style-name="ce44" office:value-type="float" office:value="8114499640" calcext:value-type="float">
            <text:p>8114499640</text:p>
          </table:table-cell>
          <table:table-cell table:style-name="ce44" table:number-columns-repeated="9"/>
          <table:table-cell table:style-name="ce7" table:number-columns-repeated="3"/>
          <table:table-cell table:number-columns-repeated="987"/>
        </table:table-row>
        <table:table-row table:style-name="ro2">
          <table:table-cell table:style-name="ce41" office:value-type="date" office:date-value="2025-11-23T10:25:41" calcext:value-type="date">
            <text:p>11/23/2025 10:25:41</text:p>
          </table:table-cell>
          <table:table-cell table:style-name="ce43" office:value-type="string" calcext:value-type="string">
            <text:p>PS231025-607</text:p>
          </table:table-cell>
          <table:table-cell table:style-name="ce43" office:value-type="string" calcext:value-type="string">
            <text:p>Naik Berat Badan</text:p>
          </table:table-cell>
          <table:table-cell table:style-name="ce43" office:value-type="float" office:value="800000" calcext:value-type="float">
            <text:p>800000</text:p>
          </table:table-cell>
          <table:table-cell table:style-name="ce44" office:value-type="string" calcext:value-type="string">
            <text:p>Asshiddiqie</text:p>
          </table:table-cell>
          <table:table-cell table:style-name="ce43" office:value-type="string" calcext:value-type="string">
            <text:p>Abdulkadir No 4</text:p>
          </table:table-cell>
          <table:table-cell table:style-name="ce45" office:value-type="float" office:value="85348668307" calcext:value-type="float">
            <text:p>85348668307</text:p>
          </table:table-cell>
          <table:table-cell table:style-name="ce43" office:value-type="string" calcext:value-type="string">
            <text:p>amihaji@Gmail.com</text:p>
          </table:table-cell>
          <table:table-cell table:style-name="ce43" office:value-type="string" calcext:value-type="string">
            <text:p>ujung</text:p>
          </table:table-cell>
          <table:table-cell table:style-name="ce43" office:value-type="string" calcext:value-type="string">
            <text:p>pandang</text:p>
          </table:table-cell>
          <table:table-cell table:style-name="ce43" office:value-type="string" calcext:value-type="string">
            <text:p>makassar</text:p>
          </table:table-cell>
          <table:table-cell table:style-name="ce43" office:value-type="string" calcext:value-type="string">
            <text:p>sulsel</text:p>
          </table:table-cell>
          <table:table-cell table:style-name="ce46" office:value-type="string" calcext:value-type="string">
            <text:p>assidik</text:p>
          </table:table-cell>
          <table:table-cell table:style-name="ce43" office:value-type="string" calcext:value-type="string">
            <text:p>pria</text:p>
          </table:table-cell>
          <table:table-cell table:style-name="ce49" office:value-type="date" office:date-value="2008-02-28" calcext:value-type="date">
            <text:p>28-February-2008</text:p>
          </table:table-cell>
          <table:table-cell table:style-name="ce43" office:value-type="string" calcext:value-type="string">
            <text:p>hasil yang di peroleh lambat</text:p>
          </table:table-cell>
          <table:table-cell table:style-name="ce43" office:value-type="string" calcext:value-type="string">
            <text:p>aplikasi respone lambat</text:p>
          </table:table-cell>
          <table:table-cell table:style-name="ce43" office:value-type="string" calcext:value-type="string">
            <text:p>link : donwnload sertifikat</text:p>
          </table:table-cell>
          <table:table-cell table:style-name="ce43" office:value-type="string" calcext:value-type="string">
            <text:p>Shake Berry, Teh NRG</text:p>
          </table:table-cell>
          <table:table-cell table:style-name="ce43" office:value-type="string" calcext:value-type="string">
            <text:p>hesty husain</text:p>
          </table:table-cell>
          <table:table-cell table:style-name="ce43" office:value-type="float" office:value="81241318600" calcext:value-type="float">
            <text:p>81241318600</text:p>
          </table:table-cell>
          <table:table-cell table:style-name="ce43" office:value-type="string" calcext:value-type="string">
            <text:p>mealtim</text:p>
          </table:table-cell>
          <table:table-cell table:style-name="ce43" office:value-type="string" calcext:value-type="string">
            <text:p>amihaji@gmail.com</text:p>
          </table:table-cell>
          <table:table-cell table:style-name="ce43" office:value-type="string" calcext:value-type="string">
            <text:p>hesty husain</text:p>
          </table:table-cell>
          <table:table-cell table:style-name="ce44" office:value-type="float" office:value="81241318600" calcext:value-type="float">
            <text:p>81241318600</text:p>
          </table:table-cell>
          <table:table-cell table:style-name="ce44" table:number-columns-repeated="9"/>
          <table:table-cell table:style-name="ce7" table:number-columns-repeated="3"/>
          <table:table-cell table:number-columns-repeated="987"/>
        </table:table-row>
        <table:table-row table:style-name="ro2" table:number-rows-repeated="2">
          <table:table-cell table:style-name="ce7" table:number-columns-repeated="9"/>
          <table:table-cell table:style-name="ce46" table:number-columns-repeated="2"/>
          <table:table-cell table:style-name="ce7" table:number-columns-repeated="26"/>
          <table:table-cell table:number-columns-repeated="987"/>
        </table:table-row>
        <table:table-row table:style-name="ro2">
          <table:table-cell table:style-name="ce7" table:number-columns-repeated="37"/>
          <table:table-cell table:number-columns-repeated="987"/>
        </table:table-row>
        <table:table-row table:style-name="ro2" table:number-rows-repeated="5">
          <table:table-cell table:style-name="ce7" table:number-columns-repeated="37"/>
          <table:table-cell table:number-columns-repeated="987"/>
        </table:table-row>
        <table:table-row table:style-name="ro2">
          <table:table-cell table:style-name="ce7" table:number-columns-repeated="23"/>
          <table:table-cell table:style-name="ce7" office:value-type="string" calcext:value-type="string">
            <text:p><text:s/></text:p>
          </table:table-cell>
          <table:table-cell table:style-name="ce7" table:number-columns-repeated="13"/>
          <table:table-cell table:number-columns-repeated="987"/>
        </table:table-row>
        <table:table-row table:style-name="ro2">
          <table:table-cell table:style-name="ce7" table:number-columns-repeated="37"/>
          <table:table-cell table:number-columns-repeated="987"/>
        </table:table-row>
        <table:table-row table:style-name="ro2" table:number-rows-repeated="971">
          <table:table-cell table:style-name="ce7" table:number-columns-repeated="37"/>
          <table:table-cell table:number-columns-repeated="987"/>
        </table:table-row>
        <table:table-row table:style-name="ro3" table:number-rows-repeated="10475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ROGRAM.B1:PROGRAM.B9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day/>
      <number:text>.</number:text>
      <number:month/>
    </number:date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8">
      <number:day/>
      <number:text>-</number:text>
      <number:month number:style="long" number:textual="true"/>
      <number:text>-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GRAM" style:display-name="PageStyle_PROG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KONSUMEN" style:display-name="PageStyle_DATAKONSUM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20" meta:object-count="0"/>
    <meta:generator>LibreOfficeDev/6.0.5.2$Linux_X86_64 LibreOffice_project/</meta:generator>
  </office:meta>
</office:document-meta>
</file>